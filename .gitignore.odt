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Arquivos de sistema e cachepycache</text:span>/ *.pyc .DS_Store</text:h>
      <text:p text:style-name="Text_20_body"><text:span text:style-name="T1">pycache</text:span>/ *.pyc .DS_Store</text:p>
      <text:h text:style-name="Heading_20_1" text:outline-level="1">Seus rascunhos e cadernos privados</text:h>
      <text:p text:style-name="Text_20_body">.assets_internos/ *.png *.jpg *.jpeg *.odt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19T17:17:49.712922900</meta:creation-date>
    <dc:date>2026-06-02T14:01:53.907144100</dc:date>
    <meta:editing-duration>PT12S</meta:editing-duration>
    <meta:editing-cycles>2</meta:editing-cycles>
    <meta:generator>LibreOffice/26.2.0.3$Windows_X86_64 LibreOffice_project/620$Build-3</meta:generator>
    <meta:document-statistic meta:table-count="0" meta:image-count="0" meta:object-count="0" meta:page-count="1" meta:paragraph-count="4" meta:word-count="20" meta:character-count="151" meta:non-whitespace-character-count="135"/>
  </office:meta>
</office:document-meta>
</file>