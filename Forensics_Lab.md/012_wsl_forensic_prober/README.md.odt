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SL Forensic Prober (Project 012)</text:h>
      <text:p text:style-name="Text_20_body">A specialized forensic audit tool designed for WSL (Windows Subsystem for Linux) and native Linux environments.</text:p>
      <text:h text:style-name="Heading_20_2" text:outline-level="2">Technical Explanation</text:h>
      <text:list text:style-name="L1">
        <text:list-item>
          <text:p text:style-name="P1"><text:span text:style-name="T1">Signature Analysis:</text:span> Uses hexadecimal "Magic Numbers" to verify if files have been renamed to disguise their true nature (e.g., an <text:span text:style-name="T2">.exe</text:span> disguised as a <text:span text:style-name="T2">.txt</text:span>).</text:p>
        </text:list-item>
        <text:list-item>
          <text:p text:style-name="P1"><text:span text:style-name="T1">Persistence Detection:</text:span> Scans critical Linux initialization files (<text:span text:style-name="T2">.bashrc</text:span>, <text:span text:style-name="T2">.profile</text:span>) for common reverse shell signatures (<text:span text:style-name="T2">curl</text:span>, <text:span text:style-name="T2">nc</text:span>).</text:p>
        </text:list-item>
        <text:list-item>
          <text:p text:style-name="P1"><text:span text:style-name="T1">Resource Auditing:</text:span> Correlates high CPU utilization with specific PIDs, aiding in the detection of hidden miners or malicious agent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Disguised Malware:</text:span> Detects files that claim to be one type but have headers of another.</text:p>
        </text:list-item>
        <text:list-item>
          <text:p text:style-name="P2"><text:span text:style-name="T1">Persistence Discovery:</text:span> Identifies mechanisms attackers use to ensure their code runs every time the Linux shell opens.</text:p>
        </text:list-item>
        <text:list-item>
          <text:p text:style-name="P2"><text:span text:style-name="T1">Evidence Timeline:</text:span> Extracts creation/modification timestamps, forming the backbone of any forensic timeline analysi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Signature</text:span></text:p>
          </table:table-cell>
          <table:table-cell table:style-name="Tabela1.A2" office:value-type="string">
            <text:p text:style-name="P4">Magic Numbers</text:p>
          </table:table-cell>
          <table:table-cell table:style-name="Tabela1.C2" office:value-type="string">
            <text:p text:style-name="P4">Metadata (file extensions) can be easily faked; binary signatures cannot.</text:p>
          </table:table-cell>
        </table:table-row>
        <table:table-row>
          <table:table-cell table:style-name="Tabela1.A2" office:value-type="string">
            <text:p text:style-name="Table_20_Contents"><text:span text:style-name="T1">Integrity</text:span></text:p>
          </table:table-cell>
          <table:table-cell table:style-name="Tabela1.A2" office:value-type="string">
            <text:p text:style-name="Table_20_Contents"><text:span text:style-name="T2">os.stat</text:span></text:p>
          </table:table-cell>
          <table:table-cell table:style-name="Tabela1.C2" office:value-type="string">
            <text:p text:style-name="P4">Provides hardware-level file timestamps that are harder for non-root users to spoof.</text:p>
          </table:table-cell>
        </table:table-row>
        <table:table-row>
          <table:table-cell table:style-name="Tabela1.A2" office:value-type="string">
            <text:p text:style-name="Table_20_Contents"><text:span text:style-name="T1">Detection</text:span></text:p>
          </table:table-cell>
          <table:table-cell table:style-name="Tabela1.A2" office:value-type="string">
            <text:p text:style-name="P4">Real-time Monitor</text:p>
          </table:table-cell>
          <table:table-cell table:style-name="Tabela1.C2" office:value-type="string">
            <text:p text:style-name="P4">Captures file system events that logs might fail to record.</text:p>
          </table:table-cell>
        </table:table-row>
      </table:table>
      <text:p text:style-name="Text_20_body"/>
      <text:h text:style-name="Heading_20_2" text:outline-level="2">Usage</text:h>
      <text:p text:style-name="P5">from 012_wsl_forensic_prober import WSLForensicProber<text:line-break/><text:line-break/>prober = WSLForensicProber()<text:line-break/>prober.analyze_file_integrity("/mnt/c/evidence.exe")<text:line-break/>prober.check_persistenc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8:24:09.055945200</meta:creation-date>
    <dc:date>2026-05-21T18:24:12.680757200</dc:date>
    <meta:editing-duration>PT3S</meta:editing-duration>
    <meta:editing-cycles>1</meta:editing-cycles>
    <meta:document-statistic meta:table-count="1" meta:image-count="0" meta:object-count="0" meta:page-count="1" meta:paragraph-count="25" meta:word-count="196" meta:character-count="1441" meta:non-whitespace-character-count="1275"/>
    <meta:generator>LibreOffice/26.2.0.3$Windows_X86_64 LibreOffice_project/620$Build-3</meta:generator>
  </office:meta>
</office:document-meta>
</file>