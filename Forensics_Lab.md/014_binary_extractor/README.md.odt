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nary Extractor &amp; String Utility (Project 014)</text:h>
      <text:p text:style-name="Text_20_body">A static analysis forensic tool designed to parse binary file structures, establish precise timelines, and mine raw data for human-readable content.</text:p>
      <text:h text:style-name="Heading_20_2" text:outline-level="2">Technical Explanation</text:h>
      <text:list text:style-name="L1">
        <text:list-item>
          <text:p text:style-name="P1"><text:span text:style-name="T1">MAC Timelines:</text:span> Queries OS-level metadata to fetch timestamps (Access, Modification, Creation), crucial for reconstructive session indexing.</text:p>
        </text:list-item>
        <text:list-item>
          <text:p text:style-name="P1"><text:span text:style-name="T1">Header Verification:</text:span> Inspects the first 4 bytes of raw binary code (the Magic Numbers) to cross-reference data integrity and alert on extension masking.</text:p>
        </text:list-item>
        <text:list-item>
          <text:p text:style-name="P1"><text:span text:style-name="T1">String Carving:</text:span> Employs a specific regular expression pattern (<text:span text:style-name="T2">[a-zA-Z0-9/._-]{4,}</text:span>) combined with an alternative encoding error override to drop non-printable machine instructions while leaving plain text intact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Malware Code Inspection:</text:span> Safely uncovers hidden variables, domains, URLs, or system commands embedded inside compiled programs without detonating them.</text:p>
        </text:list-item>
        <text:list-item>
          <text:p text:style-name="P2"><text:span text:style-name="T1">Masquerading Countermeasures:</text:span> Immediately flags malicious payload extensions attempting to pass through security filters as standard images or documents.</text:p>
        </text:list-item>
        <text:list-item>
          <text:p text:style-name="P2"><text:span text:style-name="T1">Temporal Reconstruction:</text:span> Builds accurate attack footprints by evaluating exactly when suspicious files arrived and dropped execution tokens onto disk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Parsing Technique</text:span></text:p>
          </table:table-cell>
          <table:table-cell table:style-name="Tabela1.A2" office:value-type="string">
            <text:p text:style-name="P4">Regex Scan</text:p>
          </table:table-cell>
          <table:table-cell table:style-name="Tabela1.C2" office:value-type="string">
            <text:p text:style-name="Table_20_Contents">Simulates the traditional Linux <text:span text:style-name="T2">strings</text:span> tool natively within Python, eliminating cross-platform subshell compilation issues.</text:p>
          </table:table-cell>
        </table:table-row>
        <table:table-row>
          <table:table-cell table:style-name="Tabela1.A2" office:value-type="string">
            <text:p text:style-name="Table_20_Contents"><text:span text:style-name="T1">Error Flagging</text:span></text:p>
          </table:table-cell>
          <table:table-cell table:style-name="Tabela1.A2" office:value-type="string">
            <text:p text:style-name="Table_20_Contents"><text:span text:style-name="T2">errors='ignore'</text:span></text:p>
          </table:table-cell>
          <table:table-cell table:style-name="Tabela1.C2" office:value-type="string">
            <text:p text:style-name="P4">Prevents character conversion faults from crashing stack routines when streaming wide UTF block matrices.</text:p>
          </table:table-cell>
        </table:table-row>
        <table:table-row>
          <table:table-cell table:style-name="Tabela1.A2" office:value-type="string">
            <text:p text:style-name="Table_20_Contents"><text:span text:style-name="T1">Fallback Check</text:span></text:p>
          </table:table-cell>
          <table:table-cell table:style-name="Tabela1.A2" office:value-type="string">
            <text:p text:style-name="P4">Nested dict slice</text:p>
          </table:table-cell>
          <table:table-cell table:style-name="Tabela1.C2" office:value-type="string">
            <text:p text:style-name="Table_20_Contents">Properly evaluates short 2-byte structural signals (like <text:span text:style-name="T2">4d5a</text:span>) without throwing index exceptions.</text:p>
          </table:table-cell>
        </table:table-row>
      </table:table>
      <text:p text:style-name="Text_20_body"/>
      <text:h text:style-name="Heading_20_2" text:outline-level="2"><text:soft-page-break/>Usage</text:h>
      <text:p text:style-name="P5">from 014_binary_extractor import BinaryExtractor<text:line-break/><text:line-break/>extractor = BinaryExtractor("malicious_artifact.bin")<text:line-break/>extractor.get_file_stats()<text:line-break/>extractor.verify_header()<text:line-break/>extractor.extract_strings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8:45:31.357038200</meta:creation-date>
    <dc:date>2026-05-21T18:45:35.729059800</dc:date>
    <meta:editing-duration>PT4S</meta:editing-duration>
    <meta:editing-cycles>1</meta:editing-cycles>
    <meta:document-statistic meta:table-count="1" meta:image-count="0" meta:object-count="0" meta:page-count="2" meta:paragraph-count="25" meta:word-count="232" meta:character-count="1861" meta:non-whitespace-character-count="1659"/>
    <meta:generator>LibreOffice/26.2.0.3$Windows_X86_64 LibreOffice_project/620$Build-3</meta:generator>
  </office:meta>
</office:document-meta>
</file>