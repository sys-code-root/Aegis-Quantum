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ve Forensics Threat Hunter (Project 015)</text:h>
      <text:p text:style-name="Text_20_body">A volatile data triage utility designed to analyze the live state of a system, catching aggressive process behavior and unauthorized foreign sockets.</text:p>
      <text:h text:style-name="Heading_20_2" text:outline-level="2">Technical Explanation</text:h>
      <text:list text:style-name="L1">
        <text:list-item>
          <text:p text:style-name="P1"><text:span text:style-name="T1">Live Process Triage:</text:span> Uses <text:span text:style-name="T2">psutil.process_iter</text:span> to capture execution statistics directly from volatile kernel structures without pausing system activity.</text:p>
        </text:list-item>
        <text:list-item>
          <text:p text:style-name="P1"><text:span text:style-name="T1">Network Socket Inversion:</text:span> Maps network socket frames (<text:span text:style-name="T2">psutil.net_connections</text:span>) to target states, parsing raw socket definitions into structured strings.</text:p>
        </text:list-item>
        <text:list-item>
          <text:p text:style-name="P1"><text:span text:style-name="T1">Boundary Filtering:</text:span> Evaluates endpoints against standard private address scopes (RFC 1918) to isolate rogue external communication attempts (Reverse Shells / C2 channels)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ryptojacking Mitigation:</text:span> Immediately alerts on anomalous CPU constraints caused by unauthorized cryptocurrency miners masquerading as background system tasks.</text:p>
        </text:list-item>
        <text:list-item>
          <text:p text:style-name="P2"><text:span text:style-name="T1">Volatile Evidence Capture:</text:span> Collects memory-reliant data points—such as ephemeral connections—that are permanently wiped if the system undergoes a hard reboot.</text:p>
        </text:list-item>
        <text:list-item>
          <text:p text:style-name="P2"><text:span text:style-name="T1">Command &amp; Control Discovery:</text:span> Exposes the exact IP addresses and target ports communicating actively with the compromised host machine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Data Scope</text:span></text:p>
          </table:table-cell>
          <table:table-cell table:style-name="Tabela1.A2" office:value-type="string">
            <text:p text:style-name="P4">Live Execution Pool</text:p>
          </table:table-cell>
          <table:table-cell table:style-name="Tabela1.C2" office:value-type="string">
            <text:p text:style-name="P4">Safer than standard memory dumps when disk space or operational uptime limits raw preservation tactics.</text:p>
          </table:table-cell>
        </table:table-row>
        <table:table-row>
          <table:table-cell table:style-name="Tabela1.A2" office:value-type="string">
            <text:p text:style-name="Table_20_Contents"><text:span text:style-name="T1">Network Level</text:span></text:p>
          </table:table-cell>
          <table:table-cell table:style-name="Tabela1.A2" office:value-type="string">
            <text:p text:style-name="P4">Connection State Filtering</text:p>
          </table:table-cell>
          <table:table-cell table:style-name="Tabela1.C2" office:value-type="string">
            <text:p text:style-name="Table_20_Contents">Focuses specifically on <text:span text:style-name="T2">ESTABLISHED</text:span> channels to filter out irrelevant listening sockets and dead telemetry.</text:p>
          </table:table-cell>
        </table:table-row>
        <table:table-row>
          <table:table-cell table:style-name="Tabela1.A2" office:value-type="string">
            <text:p text:style-name="Table_20_Contents"><text:span text:style-name="T1">Privilege Guard</text:span></text:p>
          </table:table-cell>
          <table:table-cell table:style-name="Tabela1.A2" office:value-type="string">
            <text:p text:style-name="Table_20_Contents">Explicit <text:span text:style-name="T2">AccessDenied</text:span> blocks</text:p>
          </table:table-cell>
          <table:table-cell table:style-name="Tabela1.C2" office:value-type="string">
            <text:p text:style-name="P4">Prevents kernel stack access restriction drops from breaking standard process list scanning.</text:p>
          </table:table-cell>
        </table:table-row>
      </table:table>
      <text:p text:style-name="Text_20_body"/>
      <text:h text:style-name="Heading_20_2" text:outline-level="2">Usage</text:h>
      <text:p text:style-name="P5">from 015_threat_hunter import ThreatHunter<text:line-break/><text:line-break/># Instantiate hunter with a custom 15% alert threshold<text:line-break/>hunter = ThreatHunter(cpu_threshold=15.0)<text:line-break/><text:soft-page-break/>hunter.scan_processes()<text:line-break/>hunter.scan_network_connections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8:51:58.115858500</meta:creation-date>
    <dc:date>2026-05-21T18:52:03.098329500</dc:date>
    <meta:editing-duration>PT5S</meta:editing-duration>
    <meta:editing-cycles>1</meta:editing-cycles>
    <meta:document-statistic meta:table-count="1" meta:image-count="0" meta:object-count="0" meta:page-count="2" meta:paragraph-count="25" meta:word-count="240" meta:character-count="1838" meta:non-whitespace-character-count="1630"/>
    <meta:generator>LibreOffice/26.2.0.3$Windows_X86_64 LibreOffice_project/620$Build-3</meta:generator>
  </office:meta>
</office:document-meta>
</file>