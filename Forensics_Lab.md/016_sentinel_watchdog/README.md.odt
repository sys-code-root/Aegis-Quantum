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ntinel File Integrity Watchdog (Project 016)</text:h>
      <text:p text:style-name="Text_20_body">A real-time File Integrity Monitoring (FIM) system built to track filesystem events and establish algorithmic data integrity chains.</text:p>
      <text:h text:style-name="Heading_20_2" text:outline-level="2">Technical Explanation</text:h>
      <text:list text:style-name="L1">
        <text:list-item>
          <text:p text:style-name="P1"><text:span text:style-name="T1">Cryptographic Baselines:</text:span> Converts full directory trees into an analytical dictionary matrix mapped by SHA-256 signatures.</text:p>
        </text:list-item>
        <text:list-item>
          <text:p text:style-name="P1"><text:span text:style-name="T1">Chunked Streaming Execution:</text:span> Streams binary files in strict 4096-byte sequences to optimize CPU execution overhead and prevent Out-Of-Memory (OOM) crashing hazards.</text:p>
        </text:list-item>
        <text:list-item>
          <text:p text:style-name="P1"><text:span text:style-name="T1">Delta Differentiation Analysis:</text:span> Evaluates state changes using continuous algorithmic polling to compute explicit delta paths (added, customized, or removed assets)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Webshell Injection Discovery:</text:span> Immediately intercepts background adversarial drop events, flagging hidden scripts (e.g., prefix scripts starting with <text:span text:style-name="T2">.</text:span>) the moment they land on disk.</text:p>
        </text:list-item>
        <text:list-item>
          <text:p text:style-name="P2"><text:span text:style-name="T1">Anti-Forensics Tracking:</text:span> Detects malicious attempts to erase system log trails or alter diagnostic tracking databases.</text:p>
        </text:list-item>
        <text:list-item>
          <text:p text:style-name="P2"><text:span text:style-name="T1">Improper System Alteration:</text:span> Provides clear data logs detailing exactly which configuration contexts were warped during an operational breach window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Analysis Mode</text:span></text:p>
          </table:table-cell>
          <table:table-cell table:style-name="Tabela1.A2" office:value-type="string">
            <text:p text:style-name="P4">SHA-256 Polling</text:p>
          </table:table-cell>
          <table:table-cell table:style-name="Tabela1.C2" office:value-type="string">
            <text:p text:style-name="P4">Cryptographic evaluation is immune to advanced metadata forging techniques like timestamp modification (timestomping).</text:p>
          </table:table-cell>
        </table:table-row>
        <table:table-row>
          <table:table-cell table:style-name="Tabela1.A2" office:value-type="string">
            <text:p text:style-name="Table_20_Contents"><text:span text:style-name="T1">Memory Strategy</text:span></text:p>
          </table:table-cell>
          <table:table-cell table:style-name="Tabela1.A2" office:value-type="string">
            <text:p text:style-name="Table_20_Contents"><text:span text:style-name="T2">4096-byte Chunking</text:span></text:p>
          </table:table-cell>
          <table:table-cell table:style-name="Tabela1.C2" office:value-type="string">
            <text:p text:style-name="P4">Guarantees system stability when validating massive files, keeping memory utilization flat.</text:p>
          </table:table-cell>
        </table:table-row>
        <table:table-row>
          <table:table-cell table:style-name="Tabela1.A2" office:value-type="string">
            <text:p text:style-name="Table_20_Contents"><text:span text:style-name="T1">Parsing Tree</text:span></text:p>
          </table:table-cell>
          <table:table-cell table:style-name="Tabela1.A2" office:value-type="string">
            <text:p text:style-name="Table_20_Contents">Recursive <text:span text:style-name="T2">os.walk</text:span></text:p>
          </table:table-cell>
          <table:table-cell table:style-name="Tabela1.C2" office:value-type="string">
            <text:p text:style-name="P4">Ensures full observation coverage across nested application structures and subdirectories.</text:p>
          </table:table-cell>
        </table:table-row>
      </table:table>
      <text:p text:style-name="Text_20_body"/>
      <text:h text:style-name="Heading_20_2" text:outline-level="2">Usage</text:h>
      <text:p text:style-name="P5">from 016_sentinel_watchdog import SentinelWatchdog<text:line-break/><text:line-break/># Initiate monitoring on critical server directories<text:line-break/><text:soft-page-break/>watchdog = SentinelWatchdog("/var/www/uploads")<text:line-break/>watchdog.start_monitoring(interval=2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8:56:41.807728300</meta:creation-date>
    <dc:date>2026-05-21T18:56:47.121620200</dc:date>
    <meta:editing-duration>PT5S</meta:editing-duration>
    <meta:editing-cycles>1</meta:editing-cycles>
    <meta:document-statistic meta:table-count="1" meta:image-count="0" meta:object-count="0" meta:page-count="2" meta:paragraph-count="25" meta:word-count="220" meta:character-count="1765" meta:non-whitespace-character-count="1575"/>
    <meta:generator>LibreOffice/26.2.0.3$Windows_X86_64 LibreOffice_project/620$Build-3</meta:generator>
  </office:meta>
</office:document-meta>
</file>