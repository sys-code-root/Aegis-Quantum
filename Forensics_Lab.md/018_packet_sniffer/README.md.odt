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able_20_Contents">
      <style:paragraph-properties fo:text-align="left" style:justify-single-word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capy Network Packet Sniffer (Project 018)</text:h>
      <text:p text:style-name="Text_20_body">A low-level network forensics utility capable of parsing raw packet frames from network interface cards and mapping header signatures across Layers 2, 3, and 4.</text:p>
      <text:h text:style-name="Heading_20_2" text:outline-level="2">Technical Explanation</text:h>
      <text:list text:style-name="L1">
        <text:list-item>
          <text:p text:style-name="P1"><text:span text:style-name="T1">Layer Demultiplexing:</text:span> Evaluates protocol fields within Scapy's structural mapping classes (<text:span text:style-name="T2">packet.haslayer</text:span>) to dynamically split nested packets.</text:p>
        </text:list-item>
        <text:list-item>
          <text:p text:style-name="P1"><text:span text:style-name="T1">Socket Dissection:</text:span> Strips raw hexadecimal bytes into structured text fields, mapping explicit network definitions (MAC IDs, IPs, Ports).</text:p>
        </text:list-item>
        <text:list-item>
          <text:p text:style-name="P1"><text:span text:style-name="T1">Buffer Management:</text:span> Drops network packets from system memory arrays immediately after evaluation via <text:span text:style-name="T2">store=0</text:span> parameters, allowing long forensic sessions to execute without freezing host environment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Cleartext Credential Leakage:</text:span> Flags insecure configurations by isolating raw Port 80 payloads where application passwords or session cookies might be leaked.</text:p>
        </text:list-item>
        <text:list-item>
          <text:p text:style-name="P2"><text:span text:style-name="T1">Data Exfiltration Trailing:</text:span> Tracks unexpected outbound connections, helping identify hidden data exfiltration attempts over non-standard interfaces.</text:p>
        </text:list-item>
        <text:list-item>
          <text:p text:style-name="P2"><text:span text:style-name="T1">Malicious DNS Analysis:</text:span> Intercepts port 53 traffic pipelines to uncover Command and Control beacon mechanisms using domain generation algorithms (DGAs)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P4">Parsing Engine</text:p>
          </table:table-cell>
          <table:table-cell table:style-name="Tabela1.A2" office:value-type="string">
            <text:p text:style-name="P5">Scapy Library</text:p>
          </table:table-cell>
          <table:table-cell table:style-name="Tabela1.C2" office:value-type="string">
            <text:p text:style-name="P5">Native packet compilation provides reliable extraction of complex fields without manually slicing raw hex offset bytes.</text:p>
          </table:table-cell>
        </table:table-row>
        <table:table-row>
          <table:table-cell table:style-name="Tabela1.A2" office:value-type="string">
            <text:p text:style-name="P4">Memory Strategy</text:p>
          </table:table-cell>
          <table:table-cell table:style-name="Tabela1.A2" office:value-type="string">
            <text:p text:style-name="Table_20_Contents"><text:span text:style-name="T2">store=0</text:span> Configuration</text:p>
          </table:table-cell>
          <table:table-cell table:style-name="Tabela1.C2" office:value-type="string">
            <text:p text:style-name="P5">Prevents kernel buffer panics or script termination during sudden network traffic spikes.</text:p>
          </table:table-cell>
        </table:table-row>
        <table:table-row>
          <table:table-cell table:style-name="Tabela1.A2" office:value-type="string">
            <text:p text:style-name="P4">Interception Mode</text:p>
          </table:table-cell>
          <table:table-cell table:style-name="Tabela1.A2" office:value-type="string">
            <text:p text:style-name="P5">BPF Socket Filters</text:p>
          </table:table-cell>
          <table:table-cell table:style-name="Tabela1.C2" office:value-type="string">
            <text:p text:style-name="Table_20_Contents">Offloads early protocol filtering (<text:span text:style-name="T2">tcp port 80</text:span>) to kernel-level subroutines, saving application processor overhead.</text:p>
          </table:table-cell>
        </table:table-row>
      </table:table>
      <text:p text:style-name="Text_20_body"/>
      <text:h text:style-name="Heading_20_2" text:outline-level="2">Usage</text:h>
      <text:p text:style-name="Text_20_body">To integrate the <text:span text:style-name="T2">PacketSniffer</text:span> into your forensic automation pipeline or run it programmatically, instantiate the class and define the burst threshold:</text:p>
      <text:p text:style-name="P6"><text:soft-page-break/>from 018_packet_sniffer import PacketSniffer<text:line-break/><text:line-break/># Initialize the forensic network decoder<text:line-break/>sniffer = PacketSniffer()<text:line-break/><text:line-break/># Example 1: Capture 5 packets of any protocol type<text:line-break/>sniffer.start_sniffing(count=5)<text:line-break/><text:line-break/># Example 2: Target cleartext web traffic specifically (Requires root/sudo privileges)<text:line-break/>sniffer.start_sniffing(count=20, filter_exp="tcp port 80")<text:line-break/><text:line-break/># Example 3: Monitor malicious DNS resolution attempts<text:line-break/>sniffer.start_sniffing(count=10, filter_exp="udp port 53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9:52:31.471695400</meta:creation-date>
    <dc:date>2026-05-21T19:55:06.775876700</dc:date>
    <meta:editing-duration>PT48S</meta:editing-duration>
    <meta:editing-cycles>2</meta:editing-cycles>
    <meta:generator>LibreOffice/26.2.0.3$Windows_X86_64 LibreOffice_project/620$Build-3</meta:generator>
    <meta:document-statistic meta:table-count="1" meta:image-count="0" meta:object-count="0" meta:page-count="2" meta:paragraph-count="26" meta:word-count="295" meta:character-count="2281" meta:non-whitespace-character-count="2014"/>
  </office:meta>
</office:document-meta>
</file>