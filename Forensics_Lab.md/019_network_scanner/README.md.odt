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P &amp; ICMP Active Network Scanner (Project 019)</text:h>
      <text:p text:style-name="Text_20_body">A network reconnaissance and forensics asset-mapping module designed to identify live targets inside local network routing domains.</text:p>
      <text:h text:style-name="Heading_20_2" text:outline-level="2">Technical Explanation</text:h>
      <text:list text:style-name="L1">
        <text:list-item>
          <text:p text:style-name="P1"><text:span text:style-name="T1">Layer 2 Broadcast Injection:</text:span> Bundles hardware Ethernet frames (<text:span text:style-name="T2">ff:ff:ff:ff:ff:ff</text:span>) to force every networking interface switch on the local wire to process the request.</text:p>
        </text:list-item>
        <text:list-item>
          <text:p text:style-name="P1"><text:span text:style-name="T1">ARP Translation Mining:</text:span> Intercepts incoming protocol replies to extract raw source bindings (<text:span text:style-name="T2">received.psrc</text:span> and <text:span text:style-name="T2">received.hwsrc</text:span>), mapping IPs directly to physical hardware NICs.</text:p>
        </text:list-item>
        <text:list-item>
          <text:p text:style-name="P1"><text:span text:style-name="T1">Network-Layer Inversion:</text:span> Compiles manual ICMP Echo Request tokens wrapped inside Time-To-Live (TTL) IP packets, assessing remote availability without relying on high-level OS socket framework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Rogue Hardware Localization:</text:span> Exposes hidden or unauthorized computers connected to local infrastructure that bypass standard directory listings.</text:p>
        </text:list-item>
        <text:list-item>
          <text:p text:style-name="P2"><text:span text:style-name="T1">IP-to-MAC Binding Logs:</text:span> Provides authentic layer 2 hardware addressing records, preventing attackers from hiding behind spoofed dynamic IP parameters.</text:p>
        </text:list-item>
        <text:list-item>
          <text:p text:style-name="P2"><text:span text:style-name="T1">Defensive Firewal Triage:</text:span> Evaluates if a compromised endpoint drops ICMP packages while reacting to explicit network queries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Discovery Protocol</text:span></text:p>
          </table:table-cell>
          <table:table-cell table:style-name="Tabela1.A2" office:value-type="string">
            <text:p text:style-name="P4">ARP Protocol Scanning</text:p>
          </table:table-cell>
          <table:table-cell table:style-name="Tabela1.C2" office:value-type="string">
            <text:p text:style-name="P4">Way faster and more reliable than ICMP scanning inside local networks, as systems cannot ignore local ARP requests.</text:p>
          </table:table-cell>
        </table:table-row>
        <table:table-row>
          <table:table-cell table:style-name="Tabela1.A2" office:value-type="string">
            <text:p text:style-name="Table_20_Contents"><text:span text:style-name="T1">Packet Control</text:span></text:p>
          </table:table-cell>
          <table:table-cell table:style-name="Tabela1.A2" office:value-type="string">
            <text:p text:style-name="P4">Natively compiled Layer 2 frames</text:p>
          </table:table-cell>
          <table:table-cell table:style-name="Tabela1.C2" office:value-type="string">
            <text:p text:style-name="P4">Grants full control over the header fields, bypassing the operational restrictions of standard Python socket connections.</text:p>
          </table:table-cell>
        </table:table-row>
        <table:table-row>
          <table:table-cell table:style-name="Tabela1.A2" office:value-type="string">
            <text:p text:style-name="Table_20_Contents"><text:span text:style-name="T1">Response Model</text:span></text:p>
          </table:table-cell>
          <table:table-cell table:style-name="Tabela1.A2" office:value-type="string">
            <text:p text:style-name="Table_20_Contents"><text:span text:style-name="T2">sr1</text:span> Framework Call</text:p>
          </table:table-cell>
          <table:table-cell table:style-name="Tabela1.C2" office:value-type="string">
            <text:p text:style-name="P4">Perfect execution model for sequential target tracking; stops reading immediately after capturing the first confirmation handshake.</text:p>
          </table:table-cell>
        </table:table-row>
      </table:table>
      <text:p text:style-name="Text_20_body"/>
      <text:h text:style-name="Heading_20_2" text:outline-level="2"><text:soft-page-break/>Usage</text:h>
      <text:p text:style-name="P5">from 019_network_scanner import NetworkScanner<text:line-break/><text:line-break/># Initialize the discovery scanner engine<text:line-break/>scanner = NetworkScanner()<text:line-break/><text:line-break/># Example 1: Execute full local mapping sweep<text:line-break/>scanner.arp_scan("192.168.1.0/24")<text:line-break/><text:line-break/># Example 2: Probe a single host endpoint directly<text:line-break/>scanner.icmp_ping("10.0.0.15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20:00:14.755191900</meta:creation-date>
    <dc:date>2026-05-21T20:00:20.517203500</dc:date>
    <meta:editing-duration>PT5S</meta:editing-duration>
    <meta:editing-cycles>1</meta:editing-cycles>
    <meta:document-statistic meta:table-count="1" meta:image-count="0" meta:object-count="0" meta:page-count="2" meta:paragraph-count="25" meta:word-count="267" meta:character-count="2008" meta:non-whitespace-character-count="1769"/>
    <meta:generator>LibreOffice/26.2.0.3$Windows_X86_64 LibreOffice_project/620$Build-3</meta:generator>
  </office:meta>
</office:document-meta>
</file>