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twork Inventory &amp; ARP Poisoning Monitor (Project 020)</text:h>
      <text:p text:style-name="Text_20_body">An advanced network forensics module built to inventory network endpoints, map hardware vendor identities, and capture active Man-in-the-Middle (MitM) ARP spoofing attacks.</text:p>
      <text:h text:style-name="Heading_20_2" text:outline-level="2">Technical Explanation</text:h>
      <text:list text:style-name="L1">
        <text:list-item>
          <text:p text:style-name="P1"><text:span text:style-name="T1">OUI Resolution Pipelines:</text:span> Strips device MAC addresses to target public API databases, mapping vendor metrics to verify supply chain asset classes.</text:p>
        </text:list-item>
        <text:list-item>
          <text:p text:style-name="P1"><text:span text:style-name="T1">Stateful Cache Auditing:</text:span> Builds an in-memory dictionary tracking state parameters (<text:span text:style-name="T2">{IP: MAC}</text:span>). This baseline serves as a source-of-truth registry to calculate unexpected changes.</text:p>
        </text:list-item>
        <text:list-item>
          <text:p text:style-name="P1"><text:span text:style-name="T1">Passive Traffic Dissection:</text:span> Binds sniffer hooks to capture opcode 2 (<text:span text:style-name="T2">ARP Reply</text:span>) frames, validating incoming data packages against the established baseline profil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an-in-the-Middle Interception:</text:span> Instantly exposes network attackers attempting to divert traffic by mapping their malicious network cards to legitimate gateway IP addresses.</text:p>
        </text:list-item>
        <text:list-item>
          <text:p text:style-name="P2"><text:span text:style-name="T1">Hardware Spoof Detection:</text:span> Identifies network anomalies where corporate assets suddenly report changing hardware characteristics.</text:p>
        </text:list-item>
        <text:list-item>
          <text:p text:style-name="P2"><text:span text:style-name="T1">Asset Supply Chain Auditing:</text:span> Automates physical vendor enumeration across subnets to isolate foreign, unapproved hardware equipment instantly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Verification Strategy</text:span></text:p>
          </table:table-cell>
          <table:table-cell table:style-name="Tabela1.A2" office:value-type="string">
            <text:p text:style-name="P4">Stateful Dictionary Lookup</text:p>
          </table:table-cell>
          <table:table-cell table:style-name="Tabela1.C2" office:value-type="string">
            <text:p text:style-name="P4">Significantly faster and more reliable than querying remote routers repeatedly to confirm interface states.</text:p>
          </table:table-cell>
        </table:table-row>
        <table:table-row>
          <table:table-cell table:style-name="Tabela1.A2" office:value-type="string">
            <text:p text:style-name="Table_20_Contents"><text:span text:style-name="T1">API Integration</text:span></text:p>
          </table:table-cell>
          <table:table-cell table:style-name="Tabela1.A2" office:value-type="string">
            <text:p text:style-name="Table_20_Contents">Integrated <text:span text:style-name="T2">time.sleep</text:span></text:p>
          </table:table-cell>
          <table:table-cell table:style-name="Tabela1.C2" office:value-type="string">
            <text:p text:style-name="P4">Protects the analysis environment from getting rate-limited or banned by public lookup servers during broad scans.</text:p>
          </table:table-cell>
        </table:table-row>
        <table:table-row>
          <table:table-cell table:style-name="Tabela1.A2" office:value-type="string">
            <text:p text:style-name="Table_20_Contents"><text:span text:style-name="T1">Filter Selection</text:span></text:p>
          </table:table-cell>
          <table:table-cell table:style-name="Tabela1.A2" office:value-type="string">
            <text:p text:style-name="Table_20_Contents">Strict BPF <text:span text:style-name="T2">"arp"</text:span> Filter</text:p>
          </table:table-cell>
          <table:table-cell table:style-name="Tabela1.C2" office:value-type="string">
            <text:p text:style-name="P4">Offloads irrelevant protocol overhead at the kernel layer, focusing processing power entirely on target address strings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020_network_inventory import NetworkInventory<text:line-break/><text:line-break/># Initialize the stateful network monitor<text:line-break/>inv = NetworkInventory()<text:line-break/><text:line-break/># Step 1: Baseline local assets (Fills the verification lookup map)<text:line-break/>inv.scan_and_identify("192.168.1.0/24")<text:line-break/><text:line-break/># Step 2: Launch passive background interception (Requires administrative root access)<text:line-break/>from scapy.all import sniff<text:line-break/>sniff(filter="arp", prn=inv.monitor_arp_changes, store=0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4:52:31.846835700</meta:creation-date>
    <dc:date>2026-05-23T14:59:40.216344400</dc:date>
    <meta:editing-duration>PT7M9S</meta:editing-duration>
    <meta:editing-cycles>1</meta:editing-cycles>
    <meta:document-statistic meta:table-count="1" meta:image-count="0" meta:object-count="0" meta:page-count="2" meta:paragraph-count="25" meta:word-count="273" meta:character-count="2133" meta:non-whitespace-character-count="1888"/>
    <meta:generator>LibreOffice/26.2.0.3$Windows_X86_64 LibreOffice_project/620$Build-3</meta:generator>
  </office:meta>
</office:document-meta>
</file>