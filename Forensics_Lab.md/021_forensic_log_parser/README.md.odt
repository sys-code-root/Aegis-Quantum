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C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able_20_Heading">
      <style:paragraph-properties fo:text-align="left" style:justify-single-word="false"/>
    </style:style>
    <style:style style:name="P4" style:family="paragraph" style:parent-style-name="Table_20_Contents">
      <style:paragraph-properties fo:text-align="left" style:justify-single-word="false"/>
    </style:style>
    <style:style style:name="P5" style:family="paragraph" style:parent-style-name="Preformatted_20_Text">
      <style:paragraph-properties fo:margin-top="0cm" fo:margin-bottom="0.499cm" style:contextual-spacing="false"/>
    </style:style>
    <style:style style:name="T1" style:family="text">
      <style:text-properties fo:font-weight="bold"/>
    </style:style>
    <style:style style:name="T2" style:family="text">
      <style:text-properties style:font-name="Liberation Mono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Forensic Log Parser &amp; Incident Auditor (Project 021)</text:h>
      <text:p text:style-name="Text_20_body">A post-incident log forensics engine designed to parse massive system text logs line-by-line, isolating indicators of compromise (IoCs), privilege escalation attempts, and auth mechanisms.</text:p>
      <text:h text:style-name="Heading_20_2" text:outline-level="2">Technical Explanation</text:h>
      <text:list text:style-name="L1">
        <text:list-item>
          <text:p text:style-name="P1"><text:span text:style-name="T1">Streaming Log Extraction:</text:span> Uses memory-safe line-by-line iterations over file descriptors, allowing the parser to process multi-gigabyte log dumps without causing RAM exhaustion.</text:p>
        </text:list-item>
        <text:list-item>
          <text:p text:style-name="P1"><text:span text:style-name="T1">Character Encoding Shielding:</text:span> Implements explicit alternative error handling (<text:span text:style-name="T2">errors='ignore'</text:span>) to prevent application crashes when dealing with broken bytes or binary structures hidden within text lines.</text:p>
        </text:list-item>
        <text:list-item>
          <text:p text:style-name="P1"><text:span text:style-name="T1">Algorithmic Signature Matching:</text:span> Converts lines to uniform uppercase matrices dynamically to perform high-speed string intersections against explicit evaluation definitions.</text:p>
        </text:list-item>
      </text:list>
      <text:h text:style-name="Heading_20_2" text:outline-level="2" text:is-list-header="true">Problems Solved</text:h>
      <text:list text:style-name="L2">
        <text:list-item>
          <text:p text:style-name="P2"><text:span text:style-name="T1">Brute-Force Attack Discovery:</text:span> Instantly filters out thousands of noise lines to group systemic failure events (<text:span text:style-name="T2">AUTH_FAILURE</text:span>, <text:span text:style-name="T2">DENIED</text:span>, <text:span text:style-name="T2">INVALID</text:span>).</text:p>
        </text:list-item>
        <text:list-item>
          <text:p text:style-name="P2"><text:span text:style-name="T1">Unauthorized Elevation Detection:</text:span> Flags unauthorized usage of high-privilege scopes (<text:span text:style-name="T2">SUDO</text:span>, <text:span text:style-name="T2">ROOT</text:span>) to audit insider threats or account takeovers.</text:p>
        </text:list-item>
        <text:list-item>
          <text:p text:style-name="P2"><text:span text:style-name="T1">Massive Data Trailing Noise Reduction:</text:span> Saves investigators hours of manual searching by condensing massive raw text dumps into a clean list of high-risk operational events.</text:p>
        </text:list-item>
      </text:list>
      <text:h text:style-name="Heading_20_2" text:outline-level="2" text:is-list-header="true">Design Decisions: "Why this instead of that?"</text:h>
      <table:table table:name="Tabela1" table:style-name="Tabela1">
        <table:table-column table:style-name="Tabela1.A" table:number-columns-repeated="3"/>
        <table:table-header-rows>
          <table:table-row>
            <table:table-cell table:style-name="Tabela1.A1" office:value-type="string">
              <text:p text:style-name="P3">Feature</text:p>
            </table:table-cell>
            <table:table-cell table:style-name="Tabela1.A1" office:value-type="string">
              <text:p text:style-name="P3">Choice</text:p>
            </table:table-cell>
            <table:table-cell table:style-name="Tabela1.C1" office:value-type="string">
              <text:p text:style-name="P3">Why?</text:p>
            </table:table-cell>
          </table:table-row>
        </table:table-header-rows>
        <table:table-row>
          <table:table-cell table:style-name="Tabela1.A2" office:value-type="string">
            <text:p text:style-name="Table_20_Contents"><text:span text:style-name="T1">I/O Pattern</text:span></text:p>
          </table:table-cell>
          <table:table-cell table:style-name="Tabela1.A2" office:value-type="string">
            <text:p text:style-name="P4">Line-by-Line Generator</text:p>
          </table:table-cell>
          <table:table-cell table:style-name="Tabela1.C2" office:value-type="string">
            <text:p text:style-name="Table_20_Contents">Far superior to <text:span text:style-name="T2">.readlines()</text:span>, which dumps the entire file into RAM and crashes when opening real enterprise log structures.</text:p>
          </table:table-cell>
        </table:table-row>
        <table:table-row>
          <table:table-cell table:style-name="Tabela1.A2" office:value-type="string">
            <text:p text:style-name="Table_20_Contents"><text:span text:style-name="T1">Parsing Strategy</text:span></text:p>
          </table:table-cell>
          <table:table-cell table:style-name="Tabela1.A2" office:value-type="string">
            <text:p text:style-name="P4">Standard String Intersection</text:p>
          </table:table-cell>
          <table:table-cell table:style-name="Tabela1.C2" office:value-type="string">
            <text:p text:style-name="P4">High-speed keyword filtering matches flat system signatures faster than heavy regular expression loops.</text:p>
          </table:table-cell>
        </table:table-row>
        <table:table-row>
          <table:table-cell table:style-name="Tabela1.A2" office:value-type="string">
            <text:p text:style-name="Table_20_Contents"><text:span text:style-name="T1">Data Enforcement</text:span></text:p>
          </table:table-cell>
          <table:table-cell table:style-name="Tabela1.A2" office:value-type="string">
            <text:p text:style-name="P4">Encoding Failure Drops</text:p>
          </table:table-cell>
          <table:table-cell table:style-name="Tabela1.C2" office:value-type="string">
            <text:p text:style-name="P4">Drops corrupted formatting blocks natively, keeping the structural timeline integrity solid without interruptions.</text:p>
          </table:table-cell>
        </table:table-row>
      </table:table>
      <text:p text:style-name="Text_20_body"/>
      <text:h text:style-name="Heading_20_2" text:outline-level="2"><text:soft-page-break/>Usage</text:h>
      <text:p text:style-name="P5">from 021_forensic_log_parser import ForensicLogParser<text:line-break/><text:line-break/># Instantiate the parser over an unverified system log dump<text:line-break/>parser = ForensicLogParser("/var/log/auth.log")<text:line-break/><text:line-break/># Run the forensic triage sweep<text:line-break/>parser.parse_logs()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23T15:44:11.139100500</meta:creation-date>
    <dc:date>2026-05-23T15:44:18.918596900</dc:date>
    <meta:editing-duration>PT8S</meta:editing-duration>
    <meta:editing-cycles>1</meta:editing-cycles>
    <meta:document-statistic meta:table-count="1" meta:image-count="0" meta:object-count="0" meta:page-count="2" meta:paragraph-count="25" meta:word-count="263" meta:character-count="2031" meta:non-whitespace-character-count="1797"/>
    <meta:generator>LibreOffice/26.2.0.3$Windows_X86_64 LibreOffice_project/620$Build-3</meta:generator>
  </office:meta>
</office:document-meta>
</file>