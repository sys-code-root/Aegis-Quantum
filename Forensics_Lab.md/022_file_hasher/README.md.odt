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ensic File Hasher (Project 022)</text:h>
      <text:p text:style-name="Text_20_body">A cryptographic integrity utility designed to generate immutable digital fingerprints (SHA-256) for forensic artifacts, essential for maintaining secure chain-of-custody records.</text:p>
      <text:h text:style-name="Heading_20_2" text:outline-level="2">Technical Explanation</text:h>
      <text:list text:style-name="L1">
        <text:list-item>
          <text:p text:style-name="P1"><text:span text:style-name="T1">Collision-Resistant Fingerprinting:</text:span> Implements the SHA-256 algorithm to create a unique signature, ensuring that even single-bit modifications are detected during re-verification.</text:p>
        </text:list-item>
        <text:list-item>
          <text:p text:style-name="P1"><text:span text:style-name="T1">Buffered Binary Streaming:</text:span> Processes target files using <text:span text:style-name="T2">4KB</text:span> chunk streams, ensuring system-level performance remains fluid even when hashing massive forensic drive images (e.g., .E01 or .dd files).</text:p>
        </text:list-item>
        <text:list-item>
          <text:p text:style-name="P1"><text:span text:style-name="T1">Immutable Baseline Creation:</text:span> Provides the foundational hash necessary for legal-grade evidence verification, allowing independent auditors to confirm the artifact has not been modified since collection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hain of Custody Verification:</text:span> Allows investigators to prove that an evidence file currently under analysis is identical to the file captured at the crime scene.</text:p>
        </text:list-item>
        <text:list-item>
          <text:p text:style-name="P2"><text:span text:style-name="T1">Metadata Forgery Detection:</text:span> Effectively detects "timestomping" or hidden payload injections, as any alteration to the binary data results in a total hash mismatch.</text:p>
        </text:list-item>
        <text:list-item>
          <text:p text:style-name="P2"><text:span text:style-name="T1">Data Integrity Assurance:</text:span> Validates that data transfer/copying operations during collection did not result in corruption or bit-rot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Algorithm</text:span></text:p>
          </table:table-cell>
          <table:table-cell table:style-name="Tabela1.A2" office:value-type="string">
            <text:p text:style-name="P4">SHA-256</text:p>
          </table:table-cell>
          <table:table-cell table:style-name="Tabela1.C2" office:value-type="string">
            <text:p text:style-name="P4">Offers superior collision resistance compared to MD5 or SHA-1, aligning with modern industrial standards for evidence integrity.</text:p>
          </table:table-cell>
        </table:table-row>
        <table:table-row>
          <table:table-cell table:style-name="Tabela1.A2" office:value-type="string">
            <text:p text:style-name="Table_20_Contents"><text:span text:style-name="T1">IO Strategy</text:span></text:p>
          </table:table-cell>
          <table:table-cell table:style-name="Tabela1.A2" office:value-type="string">
            <text:p text:style-name="P4">4KB Buffer Blocks</text:p>
          </table:table-cell>
          <table:table-cell table:style-name="Tabela1.C2" office:value-type="string">
            <text:p text:style-name="P4">Prevents the operating system from loading massive binary files into memory, eliminating the risk of heap overflows.</text:p>
          </table:table-cell>
        </table:table-row>
        <table:table-row>
          <table:table-cell table:style-name="Tabela1.A2" office:value-type="string">
            <text:p text:style-name="Table_20_Contents"><text:span text:style-name="T1">Encoding</text:span></text:p>
          </table:table-cell>
          <table:table-cell table:style-name="Tabela1.A2" office:value-type="string">
            <text:p text:style-name="Table_20_Contents"><text:span text:style-name="T2">rb</text:span> (Read Binary)</text:p>
          </table:table-cell>
          <table:table-cell table:style-name="Tabela1.C2" office:value-type="string">
            <text:p text:style-name="P4">Essential for forensic integrity; forces raw byte processing regardless of text-encoding or binary file headers.</text:p>
          </table:table-cell>
        </table:table-row>
      </table:table>
      <text:p text:style-name="Text_20_body"/>
      <text:h text:style-name="Heading_20_2" text:outline-level="2"><text:soft-page-break/>Usage</text:h>
      <text:p text:style-name="P5">from 022_file_hasher import ForensicFileHasher<text:line-break/><text:line-break/># Instantiate the hasher with the path to your evidence file<text:line-break/>hasher = ForensicFileHasher("disk_image_evidence.dd")<text:line-break/><text:line-break/># Generate the cryptographic signature<text:line-break/>signature = hasher.generate_hash()<text:line-break/>print(f"Artifact Fingerprint: {signature}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15:50:08.868262500</meta:creation-date>
    <dc:date>2026-05-23T15:50:14.355715100</dc:date>
    <meta:editing-duration>PT5S</meta:editing-duration>
    <meta:editing-cycles>1</meta:editing-cycles>
    <meta:document-statistic meta:table-count="1" meta:image-count="0" meta:object-count="0" meta:page-count="2" meta:paragraph-count="25" meta:word-count="272" meta:character-count="2063" meta:non-whitespace-character-count="1820"/>
    <meta:generator>LibreOffice/26.2.0.3$Windows_X86_64 LibreOffice_project/620$Build-3</meta:generator>
  </office:meta>
</office:document-meta>
</file>