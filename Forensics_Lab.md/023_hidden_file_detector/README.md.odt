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idden Artifact Detector (Project 023)</text:h>
      <text:p text:style-name="Text_20_body">A forensic triage utility that bypasses standard shell visibility to expose hidden configuration files, scripts, and persistent backdoors masked by the dotfile (.) convention.</text:p>
      <text:h text:style-name="Heading_20_2" text:outline-level="2">Technical Explanation</text:h>
      <text:list text:style-name="L1">
        <text:list-item>
          <text:p text:style-name="P1"><text:span text:style-name="T1">Dotfile Enumeration:</text:span> Performs direct filesystem listing to enumerate all directory entries, explicitly bypassing the standard shell's exclusion of dot-prefixed artifacts.</text:p>
        </text:list-item>
        <text:list-item>
          <text:p text:style-name="P1"><text:span text:style-name="T1">Forensic Triage:</text:span> Automates the search for hidden configuration stores (<text:span text:style-name="T2">.bashrc</text:span>, <text:span text:style-name="T2">.profile</text:span>) or hidden malicious directories often used by threat actors to persist within the environment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Backdoor Concealment:</text:span> Exposes malicious scripts or hidden directories created by attackers to maintain a foothold in the target system.</text:p>
        </text:list-item>
        <text:list-item>
          <text:p text:style-name="P2"><text:span text:style-name="T1">Persistence Discovery:</text:span> Locates modified shell environment configurations that automatically trigger malicious payloads upon user login.</text:p>
        </text:list-item>
        <text:list-item>
          <text:p text:style-name="P2"><text:span text:style-name="T1">Forensic Visibility:</text:span> Provides a quick audit of the directory's contents that may be invisible in typical GUI file browsers or standard CLI output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Detection</text:span></text:p>
          </table:table-cell>
          <table:table-cell table:style-name="Tabela1.A2" office:value-type="string">
            <text:p text:style-name="P4">Dot-Prefix Logic</text:p>
          </table:table-cell>
          <table:table-cell table:style-name="Tabela1.C2" office:value-type="string">
            <text:p text:style-name="P4">Uses native OS standards to ensure 100% detection coverage of hidden items without false positives.</text:p>
          </table:table-cell>
        </table:table-row>
        <table:table-row>
          <table:table-cell table:style-name="Tabela1.A2" office:value-type="string">
            <text:p text:style-name="Table_20_Contents"><text:span text:style-name="T1">I/O Strategy</text:span></text:p>
          </table:table-cell>
          <table:table-cell table:style-name="Tabela1.A2" office:value-type="string">
            <text:p text:style-name="Table_20_Contents"><text:span text:style-name="T2">os.listdir</text:span></text:p>
          </table:table-cell>
          <table:table-cell table:style-name="Tabela1.C2" office:value-type="string">
            <text:p text:style-name="P4">Queries the kernel filesystem index directly, preventing local aliases or environment settings from hiding real data.</text:p>
          </table:table-cell>
        </table:table-row>
      </table:table>
      <text:p text:style-name="Text_20_body"/>
      <text:h text:style-name="Heading_20_2" text:outline-level="2">Usage</text:h>
      <text:p text:style-name="P5">from 023_hidden_file_detector import HiddenFileDetector<text:line-break/><text:line-break/># Define the suspicious directory target<text:line-break/>detector = HiddenFileDetector("/home/user/.hidden_space")<text:line-break/><text:line-break/># Execute scan<text:line-break/>detector.scan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3T15:56:13.727363500</meta:creation-date>
    <dc:date>2026-05-23T15:56:19.456186500</dc:date>
    <meta:editing-duration>PT6S</meta:editing-duration>
    <meta:editing-cycles>1</meta:editing-cycles>
    <meta:document-statistic meta:table-count="1" meta:image-count="0" meta:object-count="0" meta:page-count="1" meta:paragraph-count="21" meta:word-count="205" meta:character-count="1544" meta:non-whitespace-character-count="1363"/>
    <meta:generator>LibreOffice/26.2.0.3$Windows_X86_64 LibreOffice_project/620$Build-3</meta:generator>
  </office:meta>
</office:document-meta>
</file>