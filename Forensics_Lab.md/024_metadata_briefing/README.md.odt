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orensic Metadata Briefing Tool (Project 024)</text:h>
      <text:p text:style-name="Text_20_body">A diagnostic tool designed to extract critical low-level file-system artifacts, enabling the rapid creation of timelines and permission audits during digital forensic triage.</text:p>
      <text:h text:style-name="Heading_20_2" text:outline-level="2">Technical Explanation</text:h>
      <text:list text:style-name="L1">
        <text:list-item>
          <text:p text:style-name="P1"><text:span text:style-name="T1">System-Call Interface:</text:span> Utilizes <text:span text:style-name="T2">os.stat</text:span> to pull raw kernel-level metadata, bypassing higher-level abstractions that might hide file attributes.</text:p>
        </text:list-item>
        <text:list-item>
          <text:p text:style-name="P1"><text:span text:style-name="T1">Octal Permission Masking:</text:span> Masks the file mode against <text:span text:style-name="T2">0o777</text:span> to isolate the standard POSIX permission structure, clarifying whether an artifact had read, write, or execute triggers.</text:p>
        </text:list-item>
        <text:list-item>
          <text:p text:style-name="P1"><text:span text:style-name="T1">Temporal Mapping:</text:span> Maps <text:span text:style-name="T2">st_mtime</text:span> (Modification Time) to standard human-readable strings, allowing investigators to identify exactly when an evidence artifact was last tampered with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Timeline Reconstruction:</text:span> Helps link specific files to the timeline of an incident by verifying exactly when they were last accessed or changed.</text:p>
        </text:list-item>
        <text:list-item>
          <text:p text:style-name="P2"><text:span text:style-name="T1">Permission Audit:</text:span> Identifies if malicious scripts or binaries were tagged as executable (<text:span text:style-name="T2">x</text:span>) by an attacker, confirming their potential for code execution.</text:p>
        </text:list-item>
        <text:list-item>
          <text:p text:style-name="P2"><text:span text:style-name="T1">Artifact Identification:</text:span> Quickly provides technical stats for triage when dealing with high volumes of unknown file dumps found in a compromised directory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Data Source</text:span></text:p>
          </table:table-cell>
          <table:table-cell table:style-name="Tabela1.A2" office:value-type="string">
            <text:p text:style-name="Table_20_Contents"><text:span text:style-name="T2">os.stat</text:span></text:p>
          </table:table-cell>
          <table:table-cell table:style-name="Tabela1.C2" office:value-type="string">
            <text:p text:style-name="P4">The most direct way to query OS metadata; it's lightweight and works instantly without external dependencies.</text:p>
          </table:table-cell>
        </table:table-row>
        <table:table-row>
          <table:table-cell table:style-name="Tabela1.A2" office:value-type="string">
            <text:p text:style-name="Table_20_Contents"><text:span text:style-name="T1">Format</text:span></text:p>
          </table:table-cell>
          <table:table-cell table:style-name="Tabela1.A2" office:value-type="string">
            <text:p text:style-name="P4">Octal Permissions</text:p>
          </table:table-cell>
          <table:table-cell table:style-name="Tabela1.C2" office:value-type="string">
            <text:p text:style-name="P4">The industry-standard representation for UNIX-like permissions, instantly recognizable to forensic investigators during triage.</text:p>
          </table:table-cell>
        </table:table-row>
      </table:table>
      <text:p text:style-name="Text_20_body"/>
      <text:h text:style-name="Heading_20_2" text:outline-level="2">Usage</text:h>
      <text:p text:style-name="Text_20_body">To extract metadata and permission artifacts for a specific evidence file, initialize the class and trigger the briefing method:</text:p>
      <text:p text:style-name="P5">from 024_metadata_briefing import MetadataBrief<text:line-break/><text:line-break/><text:soft-page-break/># Define the path to the suspected forensic artifact<text:line-break/>brief = MetadataBrief("/tmp/malicious_payload.sh")<text:line-break/><text:line-break/># Execute the forensic metadata extraction<text:line-break/>brief.get_brief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3T15:58:54.012276300</meta:creation-date>
    <dc:date>2026-05-23T16:01:07.935924100</dc:date>
    <meta:editing-duration>PT2M14S</meta:editing-duration>
    <meta:editing-cycles>1</meta:editing-cycles>
    <meta:document-statistic meta:table-count="1" meta:image-count="0" meta:object-count="0" meta:page-count="2" meta:paragraph-count="23" meta:word-count="259" meta:character-count="1905" meta:non-whitespace-character-count="1673"/>
    <meta:generator>LibreOffice/26.2.0.3$Windows_X86_64 LibreOffice_project/620$Build-3</meta:generator>
  </office:meta>
</office:document-meta>
</file>