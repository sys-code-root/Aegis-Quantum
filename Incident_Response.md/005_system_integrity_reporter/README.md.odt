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ystem Integrity Reporter (Project 5)</text:h>
      <text:p text:style-name="Text_20_body">A professional, modular utility to capture system metadata. This is a foundational script for forensic labs to quickly establish the environment baseline of a target machine.</text:p>
      <text:h text:style-name="Heading_20_2" text:outline-level="2">Technical Explanation</text:h>
      <text:list text:style-name="L1">
        <text:list-item>
          <text:p text:style-name="P1"><text:span text:style-name="T1">Metadata Extraction:</text:span> Uses the <text:span text:style-name="T2">platform</text:span> library to interface directly with the host OS, providing reliable environment details without external dependencies.</text:p>
        </text:list-item>
        <text:list-item>
          <text:p text:style-name="P1"><text:span text:style-name="T1">Context Awareness:</text:span> Detects whether the script is running as a Python source file or a compiled binary (<text:span text:style-name="T2">sys.frozen</text:span>), which is crucial when auditing environments where scripts may have been packed by tools like PyInstaller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Environment Baseline:</text:span> Quickly documents the OS architecture and version during the "Reconnaissance" phase of an audit.</text:p>
        </text:list-item>
        <text:list-item>
          <text:p text:style-name="P2"><text:span text:style-name="T1">Binary Verification:</text:span> Helps identify if the code is running as an authorized compiled tool or as an raw script in the field.</text:p>
        </text:list-item>
        <text:list-item>
          <text:p text:style-name="P2"><text:span text:style-name="T1">Automated Auditing:</text:span> Standardizes how system information is saved, allowing for easier correlation in forensic timelines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Structure</text:span></text:p>
          </table:table-cell>
          <table:table-cell table:style-name="Tabela1.A2" office:value-type="string">
            <text:p text:style-name="Table_20_Contents"><text:span text:style-name="T2">class</text:span> + <text:span text:style-name="T2">staticmethod</text:span></text:p>
          </table:table-cell>
          <table:table-cell table:style-name="Tabela1.C2" office:value-type="string">
            <text:p text:style-name="P4">Keeps the code clean and reusable for larger IR (Incident Response) engines without needing state.</text:p>
          </table:table-cell>
        </table:table-row>
        <table:table-row>
          <table:table-cell table:style-name="Tabela1.A2" office:value-type="string">
            <text:p text:style-name="Table_20_Contents"><text:span text:style-name="T1">Metadata</text:span></text:p>
          </table:table-cell>
          <table:table-cell table:style-name="Tabela1.A2" office:value-type="string">
            <text:p text:style-name="Table_20_Contents"><text:span text:style-name="T2">platform</text:span> library</text:p>
          </table:table-cell>
          <table:table-cell table:style-name="Tabela1.C2" office:value-type="string">
            <text:p text:style-name="P4">It is a built-in Python standard; it avoids dependencies and works across all platforms (Windows, Linux, macOS).</text:p>
          </table:table-cell>
        </table:table-row>
        <table:table-row>
          <table:table-cell table:style-name="Tabela1.A2" office:value-type="string">
            <text:p text:style-name="Table_20_Contents"><text:span text:style-name="T1">Context</text:span></text:p>
          </table:table-cell>
          <table:table-cell table:style-name="Tabela1.A2" office:value-type="string">
            <text:p text:style-name="Table_20_Contents"><text:span text:style-name="T2">getattr(sys, 'frozen')</text:span></text:p>
          </table:table-cell>
          <table:table-cell table:style-name="Tabela1.C2" office:value-type="string">
            <text:p text:style-name="Table_20_Contents">This is the official way to detect if a script was bundled into an <text:span text:style-name="T2">.exe</text:span>, preventing errors in production environments.</text:p>
          </table:table-cell>
        </table:table-row>
      </table:table>
      <text:p text:style-name="Text_20_body"/>
      <text:h text:style-name="Heading_20_2" text:outline-level="2">Usage</text:h>
      <text:p text:style-name="P5">from 005_system_integrity_reporter import SystemIntegrityReporter<text:line-break/><text:line-break/>reporter = SystemIntegrityReporter()<text:line-break/>reporter.generate_report("my_audit.log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5:56:12.308352600</meta:creation-date>
    <dc:date>2026-05-21T15:56:20.227359800</dc:date>
    <meta:editing-duration>PT8S</meta:editing-duration>
    <meta:editing-cycles>1</meta:editing-cycles>
    <meta:document-statistic meta:table-count="1" meta:image-count="0" meta:object-count="0" meta:page-count="1" meta:paragraph-count="24" meta:word-count="228" meta:character-count="1614" meta:non-whitespace-character-count="1414"/>
    <meta:generator>LibreOffice/26.2.0.3$Windows_X86_64 LibreOffice_project/620$Build-3</meta:generator>
  </office:meta>
</office:document-meta>
</file>