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uspicious Import Scanner (Project 6)</text:h>
      <text:p text:style-name="Text_20_body">A forensic triage tool designed to identify malicious intent in Python scripts by analyzing their structure without execution.</text:p>
      <text:h text:style-name="Heading_20_2" text:outline-level="2">Technical Explanation</text:h>
      <text:list text:style-name="L1">
        <text:list-item>
          <text:p text:style-name="P1"><text:span text:style-name="T1">AST Analysis:</text:span> Uses Python's <text:span text:style-name="T2">ast</text:span> (Abstract Syntax Tree) module to parse code into its logical structure. This allows inspection of imports without running potentially dangerous code.</text:p>
        </text:list-item>
        <text:list-item>
          <text:p text:style-name="P1"><text:span text:style-name="T1">Watchlist Heuristics:</text:span> Scans for known high-risk libraries (e.g., <text:span text:style-name="T2">socket</text:span>, <text:span text:style-name="T2">pynput</text:span>) that are commonly used in malicious payloads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Zero-Execution Triage:</text:span> Allows for the evaluation of scripts that could be malicious without risk of infection.</text:p>
        </text:list-item>
        <text:list-item>
          <text:p text:style-name="P2"><text:span text:style-name="T1">Obfuscation Bypass:</text:span> Identifies imports even if the code structure is complex or obfuscated.</text:p>
        </text:list-item>
        <text:list-item>
          <text:p text:style-name="P2"><text:span text:style-name="T1">Rapid Incident Assessment:</text:span> Provides an immediate threat level estimation during the initial phase of a security incident.</text:p>
        </text:list-item>
      </text:list>
      <text:h text:style-name="Heading_20_2" text:outline-level="2" text:is-list-header="true">Design Decisions: "Why this instead of that?"</text:h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3">Feature</text:p>
            </table:table-cell>
            <table:table-cell table:style-name="Tabela1.A1" office:value-type="string">
              <text:p text:style-name="P3">Choice</text:p>
            </table:table-cell>
            <table:table-cell table:style-name="Tabela1.C1" office:value-type="string">
              <text:p text:style-name="P3">Why?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T1">Analysis</text:span></text:p>
          </table:table-cell>
          <table:table-cell table:style-name="Tabela1.A2" office:value-type="string">
            <text:p text:style-name="P4">AST Parsing</text:p>
          </table:table-cell>
          <table:table-cell table:style-name="Tabela1.C2" office:value-type="string">
            <text:p text:style-name="P4">Safer than regex, as it correctly identifies imports in any code structure.</text:p>
          </table:table-cell>
        </table:table-row>
        <table:table-row>
          <table:table-cell table:style-name="Tabela1.A2" office:value-type="string">
            <text:p text:style-name="Table_20_Contents"><text:span text:style-name="T1">Safety</text:span></text:p>
          </table:table-cell>
          <table:table-cell table:style-name="Tabela1.A2" office:value-type="string">
            <text:p text:style-name="P4">No Execution</text:p>
          </table:table-cell>
          <table:table-cell table:style-name="Tabela1.C2" office:value-type="string">
            <text:p text:style-name="P4">The script only reads the file as text, ensuring complete isolation.</text:p>
          </table:table-cell>
        </table:table-row>
        <table:table-row>
          <table:table-cell table:style-name="Tabela1.A2" office:value-type="string">
            <text:p text:style-name="Table_20_Contents"><text:span text:style-name="T1">Structure</text:span></text:p>
          </table:table-cell>
          <table:table-cell table:style-name="Tabela1.A2" office:value-type="string">
            <text:p text:style-name="P4">Modular Class</text:p>
          </table:table-cell>
          <table:table-cell table:style-name="Tabela1.C2" office:value-type="string">
            <text:p text:style-name="Table_20_Contents">Designed for easy integration into the <text:span text:style-name="T2">Master_Dashboard</text:span>.</text:p>
          </table:table-cell>
        </table:table-row>
      </table:table>
      <text:p text:style-name="Text_20_body"/>
      <text:h text:style-name="Heading_20_2" text:outline-level="2">Usage</text:h>
      <text:p text:style-name="P5">from 006_suspicious_import_scanner import SuspiciousImportScanner<text:line-break/><text:line-break/>scanner = SuspiciousImportScanner()<text:line-break/>scanner.scan("target_script.py"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1T16:27:21.496596600</meta:creation-date>
    <dc:date>2026-05-21T16:27:30.932967800</dc:date>
    <meta:editing-duration>PT9S</meta:editing-duration>
    <meta:editing-cycles>1</meta:editing-cycles>
    <meta:document-statistic meta:table-count="1" meta:image-count="0" meta:object-count="0" meta:page-count="1" meta:paragraph-count="24" meta:word-count="179" meta:character-count="1296" meta:non-whitespace-character-count="1145"/>
    <meta:generator>LibreOffice/26.2.0.3$Windows_X86_64 LibreOffice_project/620$Build-3</meta:generator>
  </office:meta>
</office:document-meta>
</file>