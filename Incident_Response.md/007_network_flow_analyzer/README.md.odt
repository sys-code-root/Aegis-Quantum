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etwork Flow Analyzer (Project 007)</text:h>
      <text:p text:style-name="Text_20_body">A network monitoring tool that aggregates traffic flow volumes, helping to identify potential data exfiltration or C2 (Command &amp; Control) activity.</text:p>
      <text:h text:style-name="Heading_20_2" text:outline-level="2">Technical Explanation</text:h>
      <text:list text:style-name="L1">
        <text:list-item>
          <text:p text:style-name="P1"><text:span text:style-name="T1">Packet Sniffing:</text:span> Uses the <text:span text:style-name="T2">scapy</text:span> library to hook into the network stack and analyze raw packets in real-time.</text:p>
        </text:list-item>
        <text:list-item>
          <text:p text:style-name="P1"><text:span text:style-name="T1">Flow Aggregation:</text:span> Uses a <text:span text:style-name="T2">defaultdict</text:span> to track byte counts per unique connection tuple (Src, Dst, Port).</text:p>
        </text:list-item>
        <text:list-item>
          <text:p text:style-name="P1"><text:span text:style-name="T1">Non-Blocking Capture:</text:span> Operates in a streamlined mode (<text:span text:style-name="T2">store=0</text:span>), which is memory-efficient for long-running monitoring task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Data Exfiltration Detection:</text:span> Flags abnormal amounts of data moving to unknown or suspicious destinations.</text:p>
        </text:list-item>
        <text:list-item>
          <text:p text:style-name="P2"><text:span text:style-name="T1">C2 Identification:</text:span> Helps spot heartbeat-like communication patterns typical of malware.</text:p>
        </text:list-item>
        <text:list-item>
          <text:p text:style-name="P2"><text:span text:style-name="T1">Bandwidth Auditing:</text:span> Provides a breakdown of network usage by service/port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Library</text:span></text:p>
          </table:table-cell>
          <table:table-cell table:style-name="Tabela1.A2" office:value-type="string">
            <text:p text:style-name="Table_20_Contents"><text:span text:style-name="T2">scapy</text:span></text:p>
          </table:table-cell>
          <table:table-cell table:style-name="Tabela1.C2" office:value-type="string">
            <text:p text:style-name="P4">Provides granular access to protocol layers (IP/TCP) that standard socket libraries lack.</text:p>
          </table:table-cell>
        </table:table-row>
        <table:table-row>
          <table:table-cell table:style-name="Tabela1.A2" office:value-type="string">
            <text:p text:style-name="Table_20_Contents"><text:span text:style-name="T1">Storage</text:span></text:p>
          </table:table-cell>
          <table:table-cell table:style-name="Tabela1.A2" office:value-type="string">
            <text:p text:style-name="Table_20_Contents"><text:span text:style-name="T2">defaultdict</text:span></text:p>
          </table:table-cell>
          <table:table-cell table:style-name="Tabela1.C2" office:value-type="string">
            <text:p text:style-name="P4">Extremely fast lookup and aggregation during high-speed packet capture.</text:p>
          </table:table-cell>
        </table:table-row>
        <table:table-row>
          <table:table-cell table:style-name="Tabela1.A2" office:value-type="string">
            <text:p text:style-name="Table_20_Contents"><text:span text:style-name="T1">Memory</text:span></text:p>
          </table:table-cell>
          <table:table-cell table:style-name="Tabela1.A2" office:value-type="string">
            <text:p text:style-name="Table_20_Contents"><text:span text:style-name="T2">store=0</text:span></text:p>
          </table:table-cell>
          <table:table-cell table:style-name="Tabela1.C2" office:value-type="string">
            <text:p text:style-name="P4">Prevents the script from saving all packets in RAM, allowing indefinite monitoring.</text:p>
          </table:table-cell>
        </table:table-row>
      </table:table>
      <text:p text:style-name="Text_20_body"/>
      <text:h text:style-name="Heading_20_2" text:outline-level="2">Usage</text:h>
      <text:p text:style-name="P5">from 007_network_flow_analyzer import NetworkFlowAnalyzer<text:line-break/><text:line-break/>analyzer = NetworkFlowAnalyzer()<text:line-break/>analyzer.start_sniffing(count=100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6:37:21.057878600</meta:creation-date>
    <dc:date>2026-05-21T16:37:27.366738700</dc:date>
    <meta:editing-duration>PT6S</meta:editing-duration>
    <meta:editing-cycles>1</meta:editing-cycles>
    <meta:document-statistic meta:table-count="1" meta:image-count="0" meta:object-count="0" meta:page-count="1" meta:paragraph-count="25" meta:word-count="177" meta:character-count="1307" meta:non-whitespace-character-count="1160"/>
    <meta:generator>LibreOffice/26.2.0.3$Windows_X86_64 LibreOffice_project/620$Build-3</meta:generator>
  </office:meta>
</office:document-meta>
</file>