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mory Monitor (Project 008)</text:h>
      <text:p text:style-name="Text_20_body">A real-time monitoring utility that tracks the RAM usage of specific processes to detect anomalies and resource exhaustion.</text:p>
      <text:h text:style-name="Heading_20_2" text:outline-level="2">Technical Explanation</text:h>
      <text:list text:style-name="L1">
        <text:list-item>
          <text:p text:style-name="P1"><text:span text:style-name="T1">Process Iteration:</text:span> Utilizes <text:span text:style-name="T2">psutil.process_iter</text:span> to dynamically query the OS process table for memory metrics.</text:p>
        </text:list-item>
        <text:list-item>
          <text:p text:style-name="P1"><text:span text:style-name="T1">RSS Calculation:</text:span> Focuses on RSS (Resident Set Size), which accurately represents the portion of memory occupied by a process in physical RAM.</text:p>
        </text:list-item>
        <text:list-item>
          <text:p text:style-name="P1"><text:span text:style-name="T1">Non-blocking Loop:</text:span> Runs a simple <text:span text:style-name="T2">while</text:span> loop with <text:span text:style-name="T2">time.sleep</text:span> to minimize CPU footprint during monitoring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Malware Detection:</text:span> Sudden memory spikes can indicate malicious activities, such as data encryption or automated exfiltration processes.</text:p>
        </text:list-item>
        <text:list-item>
          <text:p text:style-name="P2"><text:span text:style-name="T1">Performance Troubleshooting:</text:span> Helps identify processes causing system-wide instability.</text:p>
        </text:list-item>
        <text:list-item>
          <text:p text:style-name="P2"><text:span text:style-name="T1">Automated Baselining:</text:span> Allows security analysts to establish normal memory usage patterns for critical business processes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Metric</text:span></text:p>
          </table:table-cell>
          <table:table-cell table:style-name="Tabela1.A2" office:value-type="string">
            <text:p text:style-name="P4">RSS (Resident Set Size)</text:p>
          </table:table-cell>
          <table:table-cell table:style-name="Tabela1.C2" office:value-type="string">
            <text:p text:style-name="P4">Most accurate metric for physical RAM usage, unlike virtual memory which can be misleading.</text:p>
          </table:table-cell>
        </table:table-row>
        <table:table-row>
          <table:table-cell table:style-name="Tabela1.A2" office:value-type="string">
            <text:p text:style-name="Table_20_Contents"><text:span text:style-name="T1">Search</text:span></text:p>
          </table:table-cell>
          <table:table-cell table:style-name="Tabela1.A2" office:value-type="string">
            <text:p text:style-name="Table_20_Contents"><text:span text:style-name="T2">target.lower() in name</text:span></text:p>
          </table:table-cell>
          <table:table-cell table:style-name="Tabela1.C2" office:value-type="string">
            <text:p text:style-name="P4">Provides case-insensitive matching, ensuring the monitor works regardless of how the process is written.</text:p>
          </table:table-cell>
        </table:table-row>
        <table:table-row>
          <table:table-cell table:style-name="Tabela1.A2" office:value-type="string">
            <text:p text:style-name="Table_20_Contents"><text:span text:style-name="T1">Loop</text:span></text:p>
          </table:table-cell>
          <table:table-cell table:style-name="Tabela1.A2" office:value-type="string">
            <text:p text:style-name="Table_20_Contents"><text:span text:style-name="T2">while True</text:span> + <text:span text:style-name="T2">sleep</text:span></text:p>
          </table:table-cell>
          <table:table-cell table:style-name="Tabela1.C2" office:value-type="string">
            <text:p text:style-name="P4">Simple, robust, and provides low overhead for continuous monitoring tasks.</text:p>
          </table:table-cell>
        </table:table-row>
      </table:table>
      <text:p text:style-name="Text_20_body"/>
      <text:h text:style-name="Heading_20_2" text:outline-level="2">Usage</text:h>
      <text:p text:style-name="P5">from 008_memory_monitor import MemoryMonitor<text:line-break/><text:line-break/># Monitor a specific process with a 200MB threshold<text:line-break/>monitor = MemoryMonitor("chrome.exe", threshold_mb=200.0)<text:line-break/>monitor.start_monitoring()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6:55:57.487698800</meta:creation-date>
    <dc:date>2026-05-21T16:56:04.125132600</dc:date>
    <meta:editing-duration>PT6S</meta:editing-duration>
    <meta:editing-cycles>1</meta:editing-cycles>
    <meta:document-statistic meta:table-count="1" meta:image-count="0" meta:object-count="0" meta:page-count="2" meta:paragraph-count="25" meta:word-count="204" meta:character-count="1489" meta:non-whitespace-character-count="1315"/>
    <meta:generator>LibreOffice/26.2.0.3$Windows_X86_64 LibreOffice_project/620$Build-3</meta:generator>
  </office:meta>
</office:document-meta>
</file>