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cess Watchdog (Project 009)</text:h>
      <text:p text:style-name="Text_20_body">An automated defense tool that enforces process whitelisting by terminating any unauthorized background activities in real-time.</text:p>
      <text:h text:style-name="Heading_20_2" text:outline-level="2">Technical Explanation</text:h>
      <text:list text:style-name="L1">
        <text:list-item>
          <text:p text:style-name="P1"><text:span text:style-name="T1">Dynamic Auditing:</text:span> Uses <text:span text:style-name="T2">psutil.process_iter</text:span> to poll the system's active process list continuously.</text:p>
        </text:list-item>
        <text:list-item>
          <text:p text:style-name="P1"><text:span text:style-name="T1">Whitelist Enforcement:</text:span> Matches process names against a pre-defined secure list, effectively creating an "Allow-List" environment.</text:p>
        </text:list-item>
        <text:list-item>
          <text:p text:style-name="P1"><text:span text:style-name="T1">Safety Mechanisms:</text:span> Includes logic to ignore low-PID system processes (PID &lt; 100), preventing critical kernel/OS crashe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alware Persistence:</text:span> Prevents malicious background processes from running.</text:p>
        </text:list-item>
        <text:list-item>
          <text:p text:style-name="P2"><text:span text:style-name="T1">Distraction Management:</text:span> Can be used to kill games, social media apps, or unauthorized tools while the user is studying.</text:p>
        </text:list-item>
        <text:list-item>
          <text:p text:style-name="P2"><text:span text:style-name="T1">Environment Hardening:</text:span> Ensures that only authorized security tools run on a forensic hos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Logic</text:span></text:p>
          </table:table-cell>
          <table:table-cell table:style-name="Tabela1.A2" office:value-type="string">
            <text:p text:style-name="P4">Whitelisting</text:p>
          </table:table-cell>
          <table:table-cell table:style-name="Tabela1.C2" office:value-type="string">
            <text:p text:style-name="P4">More secure than blacklisting, as it prevents all unknown software by default.</text:p>
          </table:table-cell>
        </table:table-row>
        <table:table-row>
          <table:table-cell table:style-name="Tabela1.A2" office:value-type="string">
            <text:p text:style-name="Table_20_Contents"><text:span text:style-name="T1">Safety</text:span></text:p>
          </table:table-cell>
          <table:table-cell table:style-name="Tabela1.A2" office:value-type="string">
            <text:p text:style-name="Table_20_Contents"><text:span text:style-name="T2">pid &lt; 100</text:span> filter</text:p>
          </table:table-cell>
          <table:table-cell table:style-name="Tabela1.C2" office:value-type="string">
            <text:p text:style-name="P4">Essential protection to ensure the script doesn't accidentally trigger a Blue Screen of Death (BSOD).</text:p>
          </table:table-cell>
        </table:table-row>
        <table:table-row>
          <table:table-cell table:style-name="Tabela1.A2" office:value-type="string">
            <text:p text:style-name="Table_20_Contents"><text:span text:style-name="T1">Cleanup</text:span></text:p>
          </table:table-cell>
          <table:table-cell table:style-name="Tabela1.A2" office:value-type="string">
            <text:p text:style-name="Table_20_Contents"><text:span text:style-name="T2">try-except</text:span> block</text:p>
          </table:table-cell>
          <table:table-cell table:style-name="Tabela1.C2" office:value-type="string">
            <text:p text:style-name="P4">Necessary to handle processes that die during the loop, ensuring the script keeps running.</text:p>
          </table:table-cell>
        </table:table-row>
      </table:table>
      <text:p text:style-name="Text_20_body"/>
      <text:h text:style-name="Heading_20_2" text:outline-level="2">Usage</text:h>
      <text:p text:style-name="P5">from 009_process_watchdog import ProcessWatchdog<text:line-break/><text:line-break/># Define apps you need to study<text:line-break/>watchdog = ProcessWatchdog(["code.exe", "chrome.exe"])<text:line-break/>watchdog.start_protection(interval=10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7:28:44.523154900</meta:creation-date>
    <dc:date>2026-05-21T17:28:50.589524900</dc:date>
    <meta:editing-duration>PT6S</meta:editing-duration>
    <meta:editing-cycles>1</meta:editing-cycles>
    <meta:document-statistic meta:table-count="1" meta:image-count="0" meta:object-count="0" meta:page-count="2" meta:paragraph-count="25" meta:word-count="191" meta:character-count="1405" meta:non-whitespace-character-count="1244"/>
    <meta:generator>LibreOffice/26.2.0.3$Windows_X86_64 LibreOffice_project/620$Build-3</meta:generator>
  </office:meta>
</office:document-meta>
</file>