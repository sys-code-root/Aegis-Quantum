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 Dashboard (Project 011)</text:h>
      <text:p text:style-name="Text_20_body">The centralized orchestration hub for your cybersecurity laboratory. This tool integrates all forensic, defensive, and response modules into a single, professional control panel.</text:p>
      <text:h text:style-name="Heading_20_2" text:outline-level="2">Technical Explanation</text:h>
      <text:list text:style-name="L1">
        <text:list-item>
          <text:p text:style-name="P1"><text:span text:style-name="T1">Command Pattern:</text:span> Utilizes class-based methods to map user inputs to specific security functions, ensuring a scalable architecture.</text:p>
        </text:list-item>
        <text:list-item>
          <text:p text:style-name="P1"><text:span text:style-name="T1">State Management:</text:span> Maintains an active loop that manages process execution and allows for seamless transitions between different security toolset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Operational Complexity:</text:span> Replaces multiple independent command-line executions with a unified, interactive interface.</text:p>
        </text:list-item>
        <text:list-item>
          <text:p text:style-name="P2"><text:span text:style-name="T1">Standardized Response:</text:span> Forces a consistent workflow for Incident Response, ensuring that every tool is utilized in the correct sequence.</text:p>
        </text:list-item>
        <text:list-item>
          <text:p text:style-name="P2"><text:span text:style-name="T1">Professional Triage:</text:span> Provides a "ready-to-use" environment, demonstrating full-stack automation skills to recruiters and peer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Interface</text:span></text:p>
          </table:table-cell>
          <table:table-cell table:style-name="Tabela1.A2" office:value-type="string">
            <text:p text:style-name="P4">CLI Menu</text:p>
          </table:table-cell>
          <table:table-cell table:style-name="Tabela1.C2" office:value-type="string">
            <text:p text:style-name="P4">Superior to GUI for Incident Response, as it is lighter, faster, and works over SSH sessions.</text:p>
          </table:table-cell>
        </table:table-row>
        <table:table-row>
          <table:table-cell table:style-name="Tabela1.A2" office:value-type="string">
            <text:p text:style-name="Table_20_Contents"><text:span text:style-name="T1">Structure</text:span></text:p>
          </table:table-cell>
          <table:table-cell table:style-name="Tabela1.A2" office:value-type="string">
            <text:p text:style-name="P4">OOP (Class)</text:p>
          </table:table-cell>
          <table:table-cell table:style-name="Tabela1.C2" office:value-type="string">
            <text:p text:style-name="P4">Allows you to easily plug in your new modules as you continue developing them.</text:p>
          </table:table-cell>
        </table:table-row>
        <table:table-row>
          <table:table-cell table:style-name="Tabela1.A2" office:value-type="string">
            <text:p text:style-name="Table_20_Contents"><text:span text:style-name="T1">Navigation</text:span></text:p>
          </table:table-cell>
          <table:table-cell table:style-name="Tabela1.A2" office:value-type="string">
            <text:p text:style-name="Table_20_Contents"><text:span text:style-name="T2">os.system</text:span> clear</text:p>
          </table:table-cell>
          <table:table-cell table:style-name="Tabela1.C2" office:value-type="string">
            <text:p text:style-name="P4">Provides a clean, "pro-terminal" look which is standard in low-level security tools.</text:p>
          </table:table-cell>
        </table:table-row>
      </table:table>
      <text:p text:style-name="Text_20_body"/>
      <text:h text:style-name="Heading_20_2" text:outline-level="2">Usage</text:h>
      <text:p text:style-name="P5">from 011_master_dashboard import CyberSecurityDashboard<text:line-break/><text:line-break/># Launch the orchestrator<text:line-break/>dashboard = CyberSecurityDashboard()<text:line-break/>dashboard.start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7:43:24.504997900</meta:creation-date>
    <dc:date>2026-05-21T17:43:29.754170600</dc:date>
    <meta:editing-duration>PT5S</meta:editing-duration>
    <meta:editing-cycles>1</meta:editing-cycles>
    <meta:document-statistic meta:table-count="1" meta:image-count="0" meta:object-count="0" meta:page-count="1" meta:paragraph-count="24" meta:word-count="191" meta:character-count="1428" meta:non-whitespace-character-count="1265"/>
    <meta:generator>LibreOffice/26.2.0.3$Windows_X86_64 LibreOffice_project/620$Build-3</meta:generator>
  </office:meta>
</office:document-meta>
</file>