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antum Key Distribution BB84 Simulator (Project 040)</text:h>
      <text:p text:style-name="Text_20_body">A quantum cryptography simulator implementing the BB84 protocol via IBM's Qiskit framework to safely exchange cryptographic key material using qubit superposition mechanics.</text:p>
      <text:h text:style-name="Heading_20_2" text:outline-level="2">Technical Explanation</text:h>
      <text:list text:style-name="L1">
        <text:list-item>
          <text:p text:style-name="P1"><text:span text:style-name="T1">Superposition Encoding:</text:span> Uses Hadamard gates (<text:span text:style-name="T2">H</text:span>) to shift qubits into diagonal bases, creating quantum states that cannot be copied or measured by an eavesdropper without destroying the data.</text:p>
        </text:list-item>
        <text:list-item>
          <text:p text:style-name="P1"><text:span text:style-name="T1">Basis Sifting Operations:</text:span> Simulates public channel negotiation where matching measurement filters are compared, discarding uncorrelated execution states.</text:p>
        </text:list-item>
        <text:list-item>
          <text:p text:style-name="P1"><text:span text:style-name="T1">Quantum State Observation:</text:span> Leverages the <text:span text:style-name="T2">qasm_simulator</text:span> kernel to evaluate quantum circuit results dynamically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Symmetric Key Distribution Vulnerabilities:</text:span> Solves the core flaw of classical key distribution by linking security directly to the laws of quantum mechanics rather than mathematical complexity.</text:p>
        </text:list-item>
        <text:list-item>
          <text:p text:style-name="P2"><text:span text:style-name="T1">Eavesdropping Interference:</text:span> Any interception attempt (Eve) collapses the wave function, inducing a testable error rate that alerts both operators instantly.</text:p>
        </text:list-item>
      </text:list>
      <text:h text:style-name="Heading_20_2" text:outline-level="2" text:is-list-header="true">Usage</text:h>
      <text:p text:style-name="P3">from 040_quantum_key_distribution import QuantumBB84<text:line-break/><text:line-break/># Initialize a 32-qubit key exchange pipeline<text:line-break/>qkd = QuantumBB84(32)<text:line-break/><text:line-break/># Generate the shared key<text:line-break/>secure_key = qkd.execute_exchange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26:26.588923500</meta:creation-date>
    <dc:date>2026-05-27T10:26:31.230647000</dc:date>
    <meta:editing-duration>PT5S</meta:editing-duration>
    <meta:editing-cycles>1</meta:editing-cycles>
    <meta:document-statistic meta:table-count="0" meta:image-count="0" meta:object-count="0" meta:page-count="1" meta:paragraph-count="11" meta:word-count="165" meta:character-count="1261" meta:non-whitespace-character-count="1110"/>
    <meta:generator>LibreOffice/26.2.0.3$Windows_X86_64 LibreOffice_project/620$Build-3</meta:generator>
  </office:meta>
</office:document-meta>
</file>