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over's Search Algorithm Simulator (Project 041)</text:h>
      <text:p text:style-name="Text_20_body">A quantum search implementation that utilizes amplitude amplification to find a target state within a non-structured quantum database with quadratic speedup.</text:p>
      <text:h text:style-name="Heading_20_2" text:outline-level="2">Technical Explanation</text:h>
      <text:list text:style-name="L1">
        <text:list-item>
          <text:p text:style-name="P1"><text:span text:style-name="T1">Uniform Superposition:</text:span> Initializes all possible states in the Hilbert space equally using Hadamard gates, creating a parallel search environment.</text:p>
        </text:list-item>
        <text:list-item>
          <text:p text:style-name="P1"><text:span text:style-name="T1">Oracle Phase:</text:span> Inverts the phase of the target state $|11\rangle$, effectively "tagging" the item the search engine intends to retrieve.</text:p>
        </text:list-item>
        <text:list-item>
          <text:p text:style-name="P1"><text:span text:style-name="T1">Amplitude Amplification:</text:span> The diffusion operator reflects the amplitudes about the mean, boosting the probability amplitude of the marked state while suppressing other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Unstructured Search Bottlenecks:</text:span> Provides a mathematical shortcut for searching unsorted lists where classical algorithms are constrained by linear time complexity.</text:p>
        </text:list-item>
        <text:list-item>
          <text:p text:style-name="P2"><text:span text:style-name="T1">Computational Efficiency:</text:span> Demonstrates how quantum interference can replace brute-force iterative checking with targeted probability reinforcement.</text:p>
        </text:list-item>
      </text:list>
      <text:h text:style-name="Heading_20_2" text:outline-level="2" text:is-list-header="true">Usage</text:h>
      <text:p text:style-name="P3">from 041_grover_search_algorithm import GroverSearch<text:line-break/><text:line-break/># Initialize and execute the Grover search pipeline<text:line-break/>grover = GroverSearch()<text:line-break/>grover.run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0:29:45.428268500</meta:creation-date>
    <dc:date>2026-05-27T10:29:50.737667500</dc:date>
    <meta:editing-duration>PT5S</meta:editing-duration>
    <meta:editing-cycles>1</meta:editing-cycles>
    <meta:document-statistic meta:table-count="0" meta:image-count="0" meta:object-count="0" meta:page-count="1" meta:paragraph-count="11" meta:word-count="149" meta:character-count="1155" meta:non-whitespace-character-count="1021"/>
    <meta:generator>LibreOffice/26.2.0.3$Windows_X86_64 LibreOffice_project/620$Build-3</meta:generator>
  </office:meta>
</office:document-meta>
</file>