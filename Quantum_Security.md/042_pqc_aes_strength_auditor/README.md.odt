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QC AES Strength Auditor (Project 042)</text:h>
      <text:p text:style-name="Text_20_body">A computational utility that audits symmetric key security by modeling the impact of quantum speedups (Grover's Algorithm) on key entropy.</text:p>
      <text:h text:style-name="Heading_20_2" text:outline-level="2">Technical Explanation</text:h>
      <text:list text:style-name="L1">
        <text:list-item>
          <text:p text:style-name="P1"><text:span text:style-name="T1">Complexity Modeling:</text:span> Demonstrates the degradation of security from $2^N$ to $2^{N/2}$ when applying Grover's algorithm to unstructured search spaces (like AES key spaces).</text:p>
        </text:list-item>
        <text:list-item>
          <text:p text:style-name="P1"><text:span text:style-name="T1">Exaflop Thresholding:</text:span> Uses exaflop-scale computation rates ($10^{18}$ ops/sec) to provide a realistic time-to-crack estimate for high-performance quantum hardware.</text:p>
        </text:list-item>
        <text:list-item>
          <text:p text:style-name="P1"><text:span text:style-name="T1">Entropy Auditing:</text:span> Validates that 256-bit AES remains a standard for post-quantum resistance, as its quantum-effective security (128-bit) remains beyond feasible compute horizon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Cryptographic Lifecycle Planning:</text:span> Helps determine when keys become vulnerable to future quantum advancements, allowing for proactive migration to higher bit-lengths.</text:p>
        </text:list-item>
        <text:list-item>
          <text:p text:style-name="P2"><text:span text:style-name="T1">Post-Quantum Strategy:</text:span> Confirms why AES-256 is currently considered the industry standard for remaining secure in the post-quantum era.</text:p>
        </text:list-item>
      </text:list>
      <text:h text:style-name="Heading_20_2" text:outline-level="2" text:is-list-header="true">Usage</text:h>
      <text:p text:style-name="P3">from 042_pqc_aes_strength_auditor import PQCAnalyzer<text:line-break/><text:line-break/># Initialize auditor<text:line-break/>audit = PQCAnalyzer()<text:line-break/><text:line-break/># Compare security degradation between AES-128 and AES-256<text:line-break/>audit.calculate_resistance(128)<text:line-break/>audit.calculate_resistance(256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0:31:55.026007900</meta:creation-date>
    <dc:date>2026-05-27T10:31:59.183106800</dc:date>
    <meta:editing-duration>PT4S</meta:editing-duration>
    <meta:editing-cycles>1</meta:editing-cycles>
    <meta:document-statistic meta:table-count="0" meta:image-count="0" meta:object-count="0" meta:page-count="1" meta:paragraph-count="11" meta:word-count="157" meta:character-count="1256" meta:non-whitespace-character-count="1113"/>
    <meta:generator>LibreOffice/26.2.0.3$Windows_X86_64 LibreOffice_project/620$Build-3</meta:generator>
  </office:meta>
</office:document-meta>
</file>