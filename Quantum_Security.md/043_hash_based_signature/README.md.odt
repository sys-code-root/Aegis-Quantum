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ash-Based Signature Simulator (Project 043)</text:h>
      <text:p text:style-name="Text_20_body">A prototype demonstrating the mechanics of Post-Quantum Cryptography (PQC) using hash-based signature primitives, designed to be resistant to the Shor's algorithm threat model.</text:p>
      <text:h text:style-name="Heading_20_2" text:outline-level="2">Technical Explanation</text:h>
      <text:list text:style-name="L1">
        <text:list-item>
          <text:p text:style-name="P1"><text:span text:style-name="T1">Collision Resistance:</text:span> Unlike RSA which is vulnerable to integer factorization on quantum processors, this scheme relies on the preimage resistance of SHA-256, which remains secure.</text:p>
        </text:list-item>
        <text:list-item>
          <text:p text:style-name="P1"><text:span text:style-name="T1">Secret-Message Binding:</text:span> Combines entropy (secret key) and data payload (message) to create an immutable cryptographic signature.</text:p>
        </text:list-item>
        <text:list-item>
          <text:p text:style-name="P1"><text:span text:style-name="T1">One-Time Signature (OTS) Logic:</text:span> Mimics the core principle of Lamport signatures, where the security is derived from the inability of an attacker to invert the hash function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Quantum Threat Mitigation:</text:span> Effectively replaces vulnerable asymmetric primitives (RSA/ECC) with quantum-resilient hashing logic.</text:p>
        </text:list-item>
        <text:list-item>
          <text:p text:style-name="P2"><text:span text:style-name="T1">Signature Integrity:</text:span> Ensures that data has not been tampered with, providing a foundational block for secure post-quantum communication.</text:p>
        </text:list-item>
      </text:list>
      <text:h text:style-name="Heading_20_2" text:outline-level="2" text:is-list-header="true">Usage</text:h>
      <text:p text:style-name="P3">from 043_hash_based_signature import HashSignature<text:line-break/><text:line-break/># Initialize identity<text:line-break/>pqc = HashSignature()<text:line-break/><text:line-break/># Sign a sensitive data packet<text:line-break/>sig = pqc.sign_message("Auth Data")<text:line-break/><text:line-break/># Verify identity signature<text:line-break/>valid = pqc.verify("Auth Data", sig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0:36:44.025040100</meta:creation-date>
    <dc:date>2026-05-27T10:36:48.158178400</dc:date>
    <meta:editing-duration>PT4S</meta:editing-duration>
    <meta:editing-cycles>1</meta:editing-cycles>
    <meta:document-statistic meta:table-count="0" meta:image-count="0" meta:object-count="0" meta:page-count="1" meta:paragraph-count="11" meta:word-count="166" meta:character-count="1242" meta:non-whitespace-character-count="1089"/>
    <meta:generator>LibreOffice/26.2.0.3$Windows_X86_64 LibreOffice_project/620$Build-3</meta:generator>
  </office:meta>
</office:document-meta>
</file>