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grated Quantum Attack &amp; Defense Suite (Project 044)</text:h>
      <text:p text:style-name="Text_20_body">An end-to-end simulation environment that models the lifecycle of quantum-secure communications, from key generation to potential oracle-based attack vectors and PQC hardening.</text:p>
      <text:h text:style-name="Heading_20_2" text:outline-level="2">Technical Explanation</text:h>
      <text:list text:style-name="L1">
        <text:list-item>
          <text:p text:style-name="P1"><text:span text:style-name="T1">Superposition Engine:</text:span> Uses linear algebra (NumPy arrays) to represent quantum states and apply the Hadamard gate transformation, simulating the foundational step of quantum key distribution.</text:p>
        </text:list-item>
        <text:list-item>
          <text:p text:style-name="P1"><text:span text:style-name="T1">Grover Attack Modeling:</text:span> Models the probabilistic success of quantum search amplification (<text:span text:style-name="T2">O(sqrt(N))</text:span> complexity) in a controlled simulation environment.</text:p>
        </text:list-item>
        <text:list-item>
          <text:p text:style-name="P1"><text:span text:style-name="T1">Post-Quantum Defense:</text:span> Utilizes collision-resistant cryptographic hashing (SHA-256) as a final mitigation layer, providing a secure signature immune to factorization attack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Threat Lifecycle Visualization:</text:span> Demonstrates why quantum security is not just about the exchange, but also about the resilience of the data signatures themselves.</text:p>
        </text:list-item>
        <text:list-item>
          <text:p text:style-name="P2"><text:span text:style-name="T1">Attack/Defense Balance:</text:span> Illustrates the tension between computational speedups provided by Grover's algorithm and the robustness offered by quantum-resistant hashing.</text:p>
        </text:list-item>
      </text:list>
      <text:h text:style-name="Heading_20_2" text:outline-level="2" text:is-list-header="true">Usage</text:h>
      <text:p text:style-name="P3">from 044_integrated_quantum_suite import QuantumSuite<text:line-break/><text:line-break/># Initialize the attack/defense simulation<text:line-break/>suite = QuantumSuite()<text:line-break/>suite.phase_1_4_secure_exchange()<text:line-break/>suite.phase_5_7_grover_attack(1)<text:line-break/>suite.phase_6_pqc_defense("1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0:42:43.137251600</meta:creation-date>
    <dc:date>2026-05-27T10:42:48.345437000</dc:date>
    <meta:editing-duration>PT5S</meta:editing-duration>
    <meta:editing-cycles>1</meta:editing-cycles>
    <meta:document-statistic meta:table-count="0" meta:image-count="0" meta:object-count="0" meta:page-count="1" meta:paragraph-count="11" meta:word-count="160" meta:character-count="1340" meta:non-whitespace-character-count="1195"/>
    <meta:generator>LibreOffice/26.2.0.3$Windows_X86_64 LibreOffice_project/620$Build-3</meta:generator>
  </office:meta>
</office:document-meta>
</file>