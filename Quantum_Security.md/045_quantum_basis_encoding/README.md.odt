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is Encoding Quantum Mapper (Project 045)</text:h>
      <text:p text:style-name="Text_20_body">A machine learning data-preprocessor that transforms classical bit-strings into quantum register states, serving as the foundational step for Quantum Machine Learning (QML) workflows.</text:p>
      <text:h text:style-name="Heading_20_2" text:outline-level="2">Technical Explanation</text:h>
      <text:list text:style-name="L1">
        <text:list-item>
          <text:p text:style-name="P1"><text:span text:style-name="T1">Basis Encoding:</text:span> A direct mapping technique where a classical bit $x_i \in {0, 1}$ is converted into a quantum state $|x_i\rangle$.</text:p>
        </text:list-item>
        <text:list-item>
          <text:p text:style-name="P1"><text:span text:style-name="T1">Pauli-X Transformation:</text:span> Uses X-gate rotations to transition qubits from the $|0\rangle$ ground state to the $|1\rangle$ excited state based on the input binary sequence.</text:p>
        </text:list-item>
        <text:list-item>
          <text:p text:style-name="P1"><text:span text:style-name="T1">Hilbert Space Mapping:</text:span> Translates high-dimensional classical vectors into quantum amplitudes, allowing algorithms to manipulate data in complex vector space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Classical-to-Quantum Interface:</text:span> Bridges the gap between traditional silicon-based data (0s and 1s) and quantum registers required for advanced computation.</text:p>
        </text:list-item>
        <text:list-item>
          <text:p text:style-name="P2"><text:span text:style-name="T1">Data Preparation for QML:</text:span> Provides the necessary input format for variational circuits and quantum-enhanced optimization tasks.</text:p>
        </text:list-item>
      </text:list>
      <text:h text:style-name="Heading_20_2" text:outline-level="2" text:is-list-header="true">Usage</text:h>
      <text:p text:style-name="P3">from 045_quantum_basis_encoding import QuantumEncoder<text:line-break/><text:line-break/># Map binary payload '101' to a 3-qubit quantum state<text:line-break/>encoder = QuantumEncoder("101")<text:line-break/>output_states = encoder.run_simulation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0:44:39.994236100</meta:creation-date>
    <dc:date>2026-05-27T10:44:45.163931000</dc:date>
    <meta:editing-duration>PT5S</meta:editing-duration>
    <meta:editing-cycles>1</meta:editing-cycles>
    <meta:document-statistic meta:table-count="0" meta:image-count="0" meta:object-count="0" meta:page-count="1" meta:paragraph-count="11" meta:word-count="158" meta:character-count="1194" meta:non-whitespace-character-count="1051"/>
    <meta:generator>LibreOffice/26.2.0.3$Windows_X86_64 LibreOffice_project/620$Build-3</meta:generator>
  </office:meta>
</office:document-meta>
</file>