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mplitude Encoding Quantum Compressor (Project 046)</text:h>
      <text:p text:style-name="Text_20_body">A quantum data-density optimization utility that maps classical vectors into quantum amplitudes, allowing for exponential storage compression relative to qubit count.</text:p>
      <text:h text:style-name="Heading_20_2" text:outline-level="2">Technical Explanation</text:h>
      <text:list text:style-name="L1">
        <text:list-item>
          <text:p text:style-name="P1"><text:span text:style-name="T1">Amplitude Mapping:</text:span> Unlike classical registers that hold one state, a quantum state $|\psi\rangle = \sum_{i=0}^{N-1} \alpha_i |i\rangle$ stores $N$ amplitudes. This utility maps classical vector components directly to these $\alpha_i$ coefficients.</text:p>
        </text:list-item>
        <text:list-item>
          <text:p text:style-name="P1"><text:span text:style-name="T1">Normalization Requirements:</text:span> Enforces L2-norm constraints ($||\psi|| = 1$), ensuring the quantum state vector remains a valid probabilistic distribution.</text:p>
        </text:list-item>
        <text:list-item>
          <text:p text:style-name="P1"><text:span text:style-name="T1">Exponential Scaling:</text:span> Demonstrates the ability to store $2^n$ classical values within an $n$-qubit quantum register.</text:p>
        </text:list-item>
      </text:list>
      <text:h text:style-name="Heading_20_2" text:outline-level="2" text:is-list-header="true">Problems Solved</text:h>
      <text:list text:style-name="L2">
        <text:list-item>
          <text:p text:style-name="P2"><text:span text:style-name="T1">Memory Bottlenecks:</text:span> Enables the representation of large classical datasets (like images or financial vectors) in extremely compact quantum registers.</text:p>
        </text:list-item>
        <text:list-item>
          <text:p text:style-name="P2"><text:span text:style-name="T1">QML Input Efficiency:</text:span> Reduces the number of qubits required for quantum algorithms, effectively lowering the hardware barrier for executing quantum machine learning models.</text:p>
        </text:list-item>
      </text:list>
      <text:h text:style-name="Heading_20_2" text:outline-level="2" text:is-list-header="true">Usage</text:h>
      <text:p text:style-name="P3">from 046_amplitude_encoding import QuantumCompressor<text:line-break/><text:line-break/># Store 4 points in 2 qubits<text:line-break/>compressor = QuantumCompressor([1.0, 2.0, 3.0, 4.0])<text:line-break/>circuit = compressor.encode(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7T10:48:39.204693300</meta:creation-date>
    <dc:date>2026-05-27T10:48:42.944364300</dc:date>
    <meta:editing-duration>PT4S</meta:editing-duration>
    <meta:editing-cycles>1</meta:editing-cycles>
    <meta:document-statistic meta:table-count="0" meta:image-count="0" meta:object-count="0" meta:page-count="1" meta:paragraph-count="11" meta:word-count="163" meta:character-count="1265" meta:non-whitespace-character-count="1117"/>
    <meta:generator>LibreOffice/26.2.0.3$Windows_X86_64 LibreOffice_project/620$Build-3</meta:generator>
  </office:meta>
</office:document-meta>
</file>