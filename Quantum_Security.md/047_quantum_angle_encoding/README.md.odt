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ngle Encoding for Quantum Neural Networks (Project 047)</text:h>
      <text:p text:style-name="Text_20_body">A data-mapping utility that translates continuous classical data into quantum register rotations, enabling the input layer for variational quantum circuits.</text:p>
      <text:h text:style-name="Heading_20_2" text:outline-level="2">Technical Explanation</text:h>
      <text:list text:style-name="L1">
        <text:list-item>
          <text:p text:style-name="P1"><text:span text:style-name="T1">Rotation Encoding:</text:span> Utilizes $R_y(\theta)$ gates, where the classical input $\theta$ determines the probability amplitude $cos(\theta/2)|0\rangle + sin(\theta/2)|1\rangle$.</text:p>
        </text:list-item>
        <text:list-item>
          <text:p text:style-name="P1"><text:span text:style-name="T1">Feature-to-Qubit Mapping:</text:span> Each feature in a dataset corresponds directly to an individual qubit, allowing for high-dimensional feature space representation.</text:p>
        </text:list-item>
        <text:list-item>
          <text:p text:style-name="P1"><text:span text:style-name="T1">QNN Foundation:</text:span> This serves as the "input layer" for hybrid quantum-classical machine learning model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Continuous Data Mapping:</text:span> Unlike basis encoding (which maps discrete bits), angle encoding allows for the direct ingestion of continuous, floating-point data points.</text:p>
        </text:list-item>
        <text:list-item>
          <text:p text:style-name="P2"><text:span text:style-name="T1">QNN Integration:</text:span> Provides the essential interface required for training variational quantum circuits using classical optimization loops.</text:p>
        </text:list-item>
      </text:list>
      <text:h text:style-name="Heading_20_2" text:outline-level="2" text:is-list-header="true">Usage</text:h>
      <text:p text:style-name="P3">from 047_quantum_angle_encoding import AngleEncoder<text:line-break/><text:line-break/># Map normalized features to 3 qubits<text:line-break/>features = [np.pi/4, np.pi/2, np.pi]<text:line-break/>encoder = AngleEncoder(features)<text:line-break/>probabilities = encoder.run_simulation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7T11:05:21.556329700</meta:creation-date>
    <dc:date>2026-05-27T11:05:25.689599500</dc:date>
    <meta:editing-duration>PT4S</meta:editing-duration>
    <meta:editing-cycles>1</meta:editing-cycles>
    <meta:document-statistic meta:table-count="0" meta:image-count="0" meta:object-count="0" meta:page-count="1" meta:paragraph-count="11" meta:word-count="148" meta:character-count="1190" meta:non-whitespace-character-count="1057"/>
    <meta:generator>LibreOffice/26.2.0.3$Windows_X86_64 LibreOffice_project/620$Build-3</meta:generator>
  </office:meta>
</office:document-meta>
</file>