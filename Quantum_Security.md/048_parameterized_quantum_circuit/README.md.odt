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rameterized Quantum Circuit (Project 048)</text:h>
      <text:p text:style-name="Text_20_body">A foundational architectural block for Variational Quantum Algorithms (VQA), allowing for the dynamic tuning of gate rotations during computational optimization loops.</text:p>
      <text:h text:style-name="Heading_20_2" text:outline-level="2">Technical Explanation</text:h>
      <text:list text:style-name="L1">
        <text:list-item>
          <text:p text:style-name="P1"><text:span text:style-name="T1">Parameter Objects:</text:span> Leverages <text:span text:style-name="T2">qiskit.circuit.Parameter</text:span> to define symbolic placeholders within the circuit, decoupled from specific numeric values.</text:p>
        </text:list-item>
        <text:list-item>
          <text:p text:style-name="P1"><text:span text:style-name="T1">Ansatz Construction:</text:span> Defines the structure of the circuit that represents the "search space" for the quantum model.</text:p>
        </text:list-item>
        <text:list-item>
          <text:p text:style-name="P1"><text:span text:style-name="T1">Dynamic Binding:</text:span> Uses <text:span text:style-name="T2">.assign_parameters()</text:span> to map classical optimization variables to specific gate rotations during iterative training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Circuit Staticity:</text:span> Solves the inability of standard static circuits to adapt to new data, enabling the creation of models that "learn."</text:p>
        </text:list-item>
        <text:list-item>
          <text:p text:style-name="P2"><text:span text:style-name="T1">Hybrid Workflow Integration:</text:span> Bridges the gap between classical optimizers (which suggest rotation values) and quantum circuits (which execute them).</text:p>
        </text:list-item>
      </text:list>
      <text:h text:style-name="Heading_20_2" text:outline-level="2" text:is-list-header="true">Usage</text:h>
      <text:p text:style-name="P3">from 048_parameterized_quantum_circuit import ParameterizedCircuit<text:line-break/><text:line-break/># Build the circuit<text:line-break/>ansatz = ParameterizedCircuit()<text:line-break/><text:line-break/># Bind parameters to values provided by an optimizer<text:line-break/>optimized_circuit = ansatz.assign_value(0.75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1:10:28.852469300</meta:creation-date>
    <dc:date>2026-05-27T11:10:33.225425000</dc:date>
    <meta:editing-duration>PT4S</meta:editing-duration>
    <meta:editing-cycles>1</meta:editing-cycles>
    <meta:document-statistic meta:table-count="0" meta:image-count="0" meta:object-count="0" meta:page-count="1" meta:paragraph-count="11" meta:word-count="148" meta:character-count="1156" meta:non-whitespace-character-count="1022"/>
    <meta:generator>LibreOffice/26.2.0.3$Windows_X86_64 LibreOffice_project/620$Build-3</meta:generator>
  </office:meta>
</office:document-meta>
</file>