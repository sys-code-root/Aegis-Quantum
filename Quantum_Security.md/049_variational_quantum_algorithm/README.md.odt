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Variational Quantum Algorithm (VQA) Optimizer (Project 049)</text:h>
      <text:p text:style-name="Text_20_body">A hybrid quantum-classical architecture that utilizes a classical optimizer (COBYLA) to train a Parameterized Quantum Circuit (PQC) towards a target state.</text:p>
      <text:h text:style-name="Heading_20_2" text:outline-level="2">Technical Explanation</text:h>
      <text:list text:style-name="L1">
        <text:list-item>
          <text:p text:style-name="P1"><text:span text:style-name="T1">Hybrid Workflow:</text:span> Demonstrates the standard VQA paradigm: a quantum circuit executes the task, while a classical loop optimizes the parameters for the next iteration.</text:p>
        </text:list-item>
        <text:list-item>
          <text:p text:style-name="P1"><text:span text:style-name="T1">Objective Cost Mapping:</text:span> Defines the 'cost' as the probability of incorrect measurement outcomes, forcing the optimizer to minimize state collapse errors.</text:p>
        </text:list-item>
        <text:list-item>
          <text:p text:style-name="P1"><text:span text:style-name="T1">Derivative-Free Optimization:</text:span> Employs the <text:span text:style-name="T2">COBYLA</text:span> optimizer, which is robust for handling non-linear, noisy quantum surface landscapes where gradients are unavailable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Model Training:</text:span> Provides the mechanical framework for "training" quantum algorithms in the same way traditional machine learning models are trained.</text:p>
        </text:list-item>
        <text:list-item>
          <text:p text:style-name="P2"><text:span text:style-name="T1">Dynamic Adaptation:</text:span> Allows quantum hardware to self-tune rotation parameters without requiring hard-coded gate logic.</text:p>
        </text:list-item>
      </text:list>
      <text:h text:style-name="Heading_20_2" text:outline-level="2" text:is-list-header="true">Usage</text:h>
      <text:p text:style-name="P3">from 049_variational_quantum_algorithm import VariationalOptimizer<text:line-break/><text:line-break/># Instantiate and execute the optimization loop<text:line-break/>optimizer = VariationalOptimizer()<text:line-break/>result = optimizer.optimize(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7T11:13:20.029594300</meta:creation-date>
    <dc:date>2026-05-27T11:13:25.253270200</dc:date>
    <meta:editing-duration>PT5S</meta:editing-duration>
    <meta:editing-cycles>1</meta:editing-cycles>
    <meta:document-statistic meta:table-count="0" meta:image-count="0" meta:object-count="0" meta:page-count="1" meta:paragraph-count="11" meta:word-count="154" meta:character-count="1191" meta:non-whitespace-character-count="1052"/>
    <meta:generator>LibreOffice/26.2.0.3$Windows_X86_64 LibreOffice_project/620$Build-3</meta:generator>
  </office:meta>
</office:document-meta>
</file>