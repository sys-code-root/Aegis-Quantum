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rge Scale GHZ Benchmarking (Project 050)</text:h>
      <text:p text:style-name="Text_20_body">A high-memory stress test simulation designed to evaluate classical hardware limits by generating an entangled 30-qubit Greenberger-Horne-Zeilinger (GHZ) state.</text:p>
      <text:h text:style-name="Heading_20_2" text:outline-level="2">Technical Explanation</text:h>
      <text:list text:style-name="L1">
        <text:list-item>
          <text:p text:style-name="P1"><text:span text:style-name="T1">GHZ State:</text:span> A maximally entangled state that requires deep circuit depth and massive state-vector tracking.</text:p>
        </text:list-item>
        <text:list-item>
          <text:p text:style-name="P1"><text:span text:style-name="T1">Exponential Scaling:</text:span> Because the state space of $n$ qubits is $2^n$, a 30-qubit simulation requires tracking over $10^9$ complex amplitudes, pushing the limits of standard local memory.</text:p>
        </text:list-item>
        <text:list-item>
          <text:p text:style-name="P1"><text:span text:style-name="T1">Simulator Efficiency:</text:span> Utilizes <text:span text:style-name="T2">qasm_simulator</text:span> over <text:span text:style-name="T2">statevector_simulator</text:span> to reduce total memory footprint during the measurement sampling phase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Hardware Limit Assessment:</text:span> Establishes the 'ceiling' of your current local development environment for quantum research.</text:p>
        </text:list-item>
        <text:list-item>
          <text:p text:style-name="P2"><text:span text:style-name="T1">Computational Bottleneck Identification:</text:span> Provides a baseline to compare performance between different simulator backends or hardware acceleration options.</text:p>
        </text:list-item>
      </text:list>
      <text:h text:style-name="Heading_20_2" text:outline-level="2" text:is-list-header="true">Usage</text:h>
      <text:p text:style-name="P3">from 050_large_scale_ghz_benchmark import QuantumBenchmark<text:line-break/><text:line-break/># Execute 30-qubit entanglement benchmark<text:line-break/>benchmark = QuantumBenchmark(30)<text:line-break/>benchmark.run_benchmark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1:15:31.972792600</meta:creation-date>
    <dc:date>2026-05-27T11:15:35.520224600</dc:date>
    <meta:editing-duration>PT3S</meta:editing-duration>
    <meta:editing-cycles>1</meta:editing-cycles>
    <meta:document-statistic meta:table-count="0" meta:image-count="0" meta:object-count="0" meta:page-count="1" meta:paragraph-count="11" meta:word-count="138" meta:character-count="1119" meta:non-whitespace-character-count="996"/>
    <meta:generator>LibreOffice/26.2.0.3$Windows_X86_64 LibreOffice_project/620$Build-3</meta:generator>
  </office:meta>
</office:document-meta>
</file>