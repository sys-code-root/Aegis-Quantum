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Preformatted_20_Text">
      <style:paragraph-properties fo:margin-top="0cm" fo:margin-bottom="0.499cm" style:contextual-spacing="false"/>
    </style:style>
    <style:style style:name="T1" style:family="text">
      <style:text-properties style:font-name="Liberation Mono"/>
    </style:style>
    <style:style style:name="T2" style:family="text">
      <style:text-properties fo:font-weight="bol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Quantum Neural Network (QNN) Setup (Project 052)</text:h>
      <text:p text:style-name="Text_20_body">Initializes a variational QNN architecture using Qiskit Machine Learning's <text:span text:style-name="T1">EstimatorQNN</text:span> primitive, designed for hybrid quantum-classical integration.</text:p>
      <text:h text:style-name="Heading_20_2" text:outline-level="2">Technical Explanation</text:h>
      <text:list text:style-name="L1">
        <text:list-item>
          <text:p text:style-name="P1"><text:span text:style-name="T2">Estimator Primitive:</text:span> Utilizes the Estimator interface, which is the Qiskit standard for calculating expectation values of quantum observables.</text:p>
        </text:list-item>
        <text:list-item>
          <text:p text:style-name="P1"><text:span text:style-name="T2">Feature Map vs. Ansatz:</text:span> Clearly delineates between the data-encoding layer (Feature Map) and the learnable-weight layer (Ansatz), a core requirement for QML.</text:p>
        </text:list-item>
        <text:list-item>
          <text:p text:style-name="P1"><text:span text:style-name="T2">Correlational Entanglement:</text:span> Employs the <text:span text:style-name="T1">CX</text:span> (CNOT) gate to establish entanglement between qubits, allowing the network to process data dependencies that are invisible to classical linear models.</text:p>
        </text:list-item>
      </text:list>
      <text:h text:style-name="Heading_20_2" text:outline-level="2" text:is-list-header="true">Problems Solved</text:h>
      <text:list text:style-name="L2">
        <text:list-item>
          <text:p text:style-name="P2"><text:span text:style-name="T2">Model Scalability:</text:span> Moving from single-parameter circuits to <text:span text:style-name="T1">ParameterVector</text:span> enables the creation of deep, multi-input neural networks.</text:p>
        </text:list-item>
        <text:list-item>
          <text:p text:style-name="P2"><text:span text:style-name="T2">Framework Compatibility:</text:span> Establishing the QNN primitive allows for gradient-based training using classical optimizers (like Adam or COBYLA) via standard ML libraries.</text:p>
        </text:list-item>
      </text:list>
      <text:h text:style-name="Heading_20_2" text:outline-level="2" text:is-list-header="true">Usage</text:h>
      <text:p text:style-name="P3">from 052_quantum_neural_network_setup import QuantumNeuralNetworkSetup<text:line-break/><text:line-break/># Initialize network<text:line-break/>builder = QuantumNeuralNetworkSetup(n_inputs=2, n_weights=2)<text:line-break/>qnn = builder.get_qnn()<text:line-break/><text:line-break/># qnn object is now ready for training within a PyTorch or TensorFlow workflow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5-27T12:03:54.312513300</meta:creation-date>
    <dc:date>2026-05-27T12:03:57.840691900</dc:date>
    <meta:editing-duration>PT3S</meta:editing-duration>
    <meta:editing-cycles>1</meta:editing-cycles>
    <meta:document-statistic meta:table-count="0" meta:image-count="0" meta:object-count="0" meta:page-count="1" meta:paragraph-count="11" meta:word-count="164" meta:character-count="1294" meta:non-whitespace-character-count="1144"/>
    <meta:generator>LibreOffice/26.2.0.3$Windows_X86_64 LibreOffice_project/620$Build-3</meta:generator>
  </office:meta>
</office:document-meta>
</file>