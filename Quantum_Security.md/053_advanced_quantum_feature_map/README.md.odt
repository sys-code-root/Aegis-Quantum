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Liberation Mono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dvanced Quantum Feature Maps (Project 053)</text:h>
      <text:p text:style-name="Text_20_body">An implementation of a multi-layer <text:span text:style-name="T1">ZZFeatureMap</text:span> to project continuous classical vectors into deeply entangled quantum states for advanced classification models.</text:p>
      <text:h text:style-name="Heading_20_2" text:outline-level="2">Technical Explanation</text:h>
      <text:list text:style-name="L1">
        <text:list-item>
          <text:p text:style-name="P1"><text:span text:style-name="T2">Quantum Kernel Trick:</text:span> Projects classical features into the Hilbert space where complex classification boundaries can be evaluated more efficiently.</text:p>
        </text:list-item>
        <text:list-item>
          <text:p text:style-name="P1"><text:span text:style-name="T2">Non-Linear Mapping:</text:span> Uses $R_Z$ and $R_{ZZ}$ phase rotation components to ensure the classical-to-quantum translation is highly non-linear, blocking simple reverse-engineering.</text:p>
        </text:list-item>
        <text:list-item>
          <text:p text:style-name="P1"><text:span text:style-name="T2">Entanglement Cascades:</text:span> The <text:span text:style-name="T1">linear</text:span> entanglement strategy ensures that feature correlations are locked across adjacent qubits via $CX$ operations, creating a unique data signature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2">Linear Separability Overheads:</text:span> Solves data intersection problems by projecting overlapping classical clusters into higher dimensional, highly distinct quantum target spaces.</text:p>
        </text:list-item>
        <text:list-item>
          <text:p text:style-name="P2"><text:span text:style-name="T2">High-Order Correlation Tracking:</text:span> Captures complex, subtle relationships between data features that single-qubit encoding pipelines systematically drop.</text:p>
        </text:list-item>
      </text:list>
      <text:h text:style-name="Heading_20_2" text:outline-level="2" text:is-list-header="true">Usage</text:h>
      <text:p text:style-name="P3">from 053_advanced_quantum_feature_map import QuantumFeatureMap<text:line-break/><text:line-break/># Initialize a 2-dimensional feature map<text:line-break/>mapper = QuantumFeatureMap(feature_dimension=2, reps=2)<text:line-break/><text:line-break/># Encode a continuous classical data payload<text:line-break/>quantum_data_circuit = mapper.encode_data([0.5, 1.2]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3:32:00.502996200</meta:creation-date>
    <dc:date>2026-05-27T13:32:04.981000400</dc:date>
    <meta:editing-duration>PT4S</meta:editing-duration>
    <meta:editing-cycles>1</meta:editing-cycles>
    <meta:document-statistic meta:table-count="0" meta:image-count="0" meta:object-count="0" meta:page-count="1" meta:paragraph-count="11" meta:word-count="159" meta:character-count="1335" meta:non-whitespace-character-count="1190"/>
    <meta:generator>LibreOffice/26.2.0.3$Windows_X86_64 LibreOffice_project/620$Build-3</meta:generator>
  </office:meta>
</office:document-meta>
</file>