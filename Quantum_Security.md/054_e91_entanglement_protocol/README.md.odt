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91 Entanglement-Based QKD Protocol (Project 054)</text:h>
      <text:p text:style-name="Text_20_body">A quantum cryptography simulator deploying Artur Ekert's E91 protocol via maximally entangled EPR pairs to generate secure key material and safeguard communication channels.</text:p>
      <text:h text:style-name="Heading_20_2" text:outline-level="2">Technical Explanation</text:h>
      <text:list text:style-name="L1">
        <text:list-item>
          <text:p text:style-name="P1"><text:span text:style-name="T1">Bell Pair Generation:</text:span> Creates a state of maximum quantum correlation where individual qubits have no definite value until observed, but measurements remain perfectly linked.</text:p>
        </text:list-item>
        <text:list-item>
          <text:p text:style-name="P1"><text:span text:style-name="T1">Basis Rotations:</text:span> Implements arbitrary $R_y(\theta)$ transformations to allow asymmetric basis tests, mimicking real-world tests for eavesdropping detection.</text:p>
        </text:list-item>
        <text:list-item>
          <text:p text:style-name="P1"><text:span text:style-name="T1">Modern Compilation Pipeline:</text:span> Explicitly utilizes <text:span text:style-name="T2">transpile()</text:span> before code delivery, adhering to standard compilation optimization rules for modern quantum environment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Source-Independent Security:</text:span> Because security is proven by testing correlation bounds, it does not matter if the hardware generating the qubits is untrusted or compromised.</text:p>
        </text:list-item>
        <text:list-item>
          <text:p text:style-name="P2"><text:span text:style-name="T1">Interception Containment:</text:span> Any external interaction collapses the state vectors instantly, ruining the correlation stats and raising an immediate defense alert.</text:p>
        </text:list-item>
      </text:list>
      <text:h text:style-name="Heading_20_2" text:outline-level="2" text:is-list-header="true">Usage</text:h>
      <text:p text:style-name="P3">from 054_e91_entanglement_protocol import E91ProtocolSimulator<text:line-break/><text:line-break/># Launch protocol simulation execution sequence<text:line-break/>e91_engine = E91ProtocolSimulator()<text:line-break/>counts = e91_engine.run_simulation(shots=2048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7T13:35:03.078798700</meta:creation-date>
    <dc:date>2026-05-27T13:35:13.777897100</dc:date>
    <meta:editing-duration>PT11S</meta:editing-duration>
    <meta:editing-cycles>1</meta:editing-cycles>
    <meta:document-statistic meta:table-count="0" meta:image-count="0" meta:object-count="0" meta:page-count="1" meta:paragraph-count="11" meta:word-count="159" meta:character-count="1291" meta:non-whitespace-character-count="1147"/>
    <meta:generator>LibreOffice/26.2.0.3$Windows_X86_64 LibreOffice_project/620$Build-3</meta:generator>
  </office:meta>
</office:document-meta>
</file>