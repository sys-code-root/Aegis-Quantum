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ybrid Post-Quantum Cryptographic Vault (Project 055)</text:h>
      <text:p text:style-name="Text_20_body">An industrial-grade hybrid encryption framework integrating Kyber768 lattice-based KEM, Quantum Random Number Generation (QRNG), and symmetric AES-256-CBC data block structures.</text:p>
      <text:h text:style-name="Heading_20_2" text:outline-level="2">Technical Explanation</text:h>
      <text:list text:style-name="L1">
        <text:list-item>
          <text:p text:style-name="P1"><text:span text:style-name="T1">Lattice-Based Cryptography:</text:span> Integrates Crystals-Kyber (Kyber768), a primitive relying on the hardness of learning with errors (LWE) problems over modules, providing structural immunity against Shor's algorithm.</text:p>
        </text:list-item>
        <text:list-item>
          <text:p text:style-name="P1"><text:span text:style-name="T1">Quantum Entropy Sourcing:</text:span> Bypasses deterministic classical pseudorandom number generators (PRNG) by building an 8-qubit Hadamard pipeline, converting physical probability collapses into symmetric Initialization Vectors (IV).</text:p>
        </text:list-item>
        <text:list-item>
          <text:p text:style-name="P1"><text:span text:style-name="T1">Hybrid Key Encapsulation (KEM):</text:span> Leverages the security parameters of public-key mechanisms exclusively to exchange a 256-bit symmetric operational key, routing the heavy data load through optimized AES processors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The "Harvest Now, Decrypt Later" Threat:</text:span> Eradicates the vulnerability where current malicious actors capture traffic logs with the intent of using future cryptanalytic quantum computers to unpack them retrospectively.</text:p>
        </text:list-item>
        <text:list-item>
          <text:p text:style-name="P2"><text:span text:style-name="T1">Entropy Exhaustion and Predictability:</text:span> Eradicates mathematical pattern identification within cipher setups by replacing classical algorithmic PRNG states with true physical quantum randomization.</text:p>
        </text:list-item>
      </text:list>
      <text:h text:style-name="Heading_20_2" text:outline-level="2" text:is-list-header="true">Usage</text:h>
      <text:p text:style-name="P3">from 055_hybrid_vault import HybridVault<text:line-break/><text:line-break/># Initialize and test the cryptographic infrastructure<text:line-break/>vault = HybridVault()<text:line-break/>vault.run_deployment_test(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7T13:38:05.387171700</meta:creation-date>
    <dc:date>2026-05-27T13:38:09.797953200</dc:date>
    <meta:editing-duration>PT4S</meta:editing-duration>
    <meta:editing-cycles>1</meta:editing-cycles>
    <meta:document-statistic meta:table-count="0" meta:image-count="0" meta:object-count="0" meta:page-count="1" meta:paragraph-count="11" meta:word-count="180" meta:character-count="1483" meta:non-whitespace-character-count="1318"/>
    <meta:generator>LibreOffice/26.2.0.3$Windows_X86_64 LibreOffice_project/620$Build-3</meta:generator>
  </office:meta>
</office:document-meta>
</file>