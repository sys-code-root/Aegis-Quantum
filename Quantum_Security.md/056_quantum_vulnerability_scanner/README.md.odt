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uantum Vulnerability Scanner &amp; PQC Shield (Project 056)</text:h>
      <text:p text:style-name="Text_20_body">A dual-purpose security utility that audits classical encryption degradation against quantum attacks, verifies channel security using Bell's theorem, and enforces Kyber768/AES-GCM quantum resilience.</text:p>
      <text:h text:style-name="Heading_20_2" text:outline-level="2">Technical Explanation</text:h>
      <text:list text:style-name="L1">
        <text:list-item>
          <text:p text:style-name="P1"><text:span text:style-name="T1">Bell Test Verification:</text:span> Employs entangled state vectors to calculate non-local statistical thresholds, validating that the underlying communications array has not suffered classical observation intercepts.</text:p>
        </text:list-item>
        <text:list-item>
          <text:p text:style-name="P1"><text:span text:style-name="T1">Grover Threat Calculation:</text:span> Models the quantitative degradation of symmetric key vectors ($N \rightarrow \sqrt{N}$ search space reduction), demonstrating why 256-bit parameters are mandatory in the post-quantum era.</text:p>
        </text:list-item>
        <text:list-item>
          <text:p text:style-name="P1"><text:span text:style-name="T1">Authenticated PQC Ingestion:</text:span> Pairs Crystals-Kyber asymmetric key exchange with the AES-GCM (Galois/Counter Mode) authenticated operation layout, protecting both confidentiality and structural payload integrity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ryptographic Lifespan Audit:</text:span> Provides network administrators with automated calculations regarding when current infrastructure blocks will fail against quantum compute capabilities.</text:p>
        </text:list-item>
        <text:list-item>
          <text:p text:style-name="P2"><text:span text:style-name="T1">Man-in-the-Middle De-authentication:</text:span> Combines quantum channel validation with asymmetric lattice envelopes, neutralizing traditional packet capture/injection threat lines.</text:p>
        </text:list-item>
      </text:list>
      <text:h text:style-name="Heading_20_2" text:outline-level="2" text:is-list-header="true">Usage</text:h>
      <text:p text:style-name="P3">from 056_quantum_vulnerability_scanner import QuantumVulnerabilityScanner<text:line-break/><text:line-break/># Instantiate the security auditor suite<text:line-break/>scanner = QuantumVulnerabilityScanner()<text:line-break/>scanner.run_bell_test()<text:line-break/>scanner.simulate_grover_threat(256)<text:line-break/>defense_bundle = scanner.deploy_pqc_shield("Confidential Payload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3:39:58.112051800</meta:creation-date>
    <dc:date>2026-05-27T13:40:01.966641300</dc:date>
    <meta:editing-duration>PT4S</meta:editing-duration>
    <meta:editing-cycles>1</meta:editing-cycles>
    <meta:document-statistic meta:table-count="0" meta:image-count="0" meta:object-count="0" meta:page-count="1" meta:paragraph-count="11" meta:word-count="170" meta:character-count="1567" meta:non-whitespace-character-count="1412"/>
    <meta:generator>LibreOffice/26.2.0.3$Windows_X86_64 LibreOffice_project/620$Build-3</meta:generator>
  </office:meta>
</office:document-meta>
</file>