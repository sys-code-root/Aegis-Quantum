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uantum Oracle API Gateway (Project 057)</text:h>
      <text:p text:style-name="Text_20_body">An enterprise-ready FastAPI microservice implementing cryptographic signature negotiation (ML-DSA/Falcon) alongside interactive Quantum Machine Learning (QML) transaction validation logic.</text:p>
      <text:h text:style-name="Heading_20_2" text:outline-level="2">Technical Explanation</text:h>
      <text:list text:style-name="L1">
        <text:list-item>
          <text:p text:style-name="P1"><text:span text:style-name="T1">Asynchronous Service Integration:</text:span> Uses FastAPI and Uvicorn to transform low-level quantum simulation pipelines into low-latency HTTP REST API endpoints.</text:p>
        </text:list-item>
        <text:list-item>
          <text:p text:style-name="P1"><text:span text:style-name="T1">Dynamic Hardware Negotiation:</text:span> Scans host compile environments using <text:span text:style-name="T2">liboqs</text:span> bindings to establish post-quantum key signing architectures, preventing runtime execution exceptions via hash emulations.</text:p>
        </text:list-item>
        <text:list-item>
          <text:p text:style-name="P1"><text:span text:style-name="T1">Non-Linear Classification Vectors:</text:span> Implements data dimension splitting using a <text:span text:style-name="T2">ZZFeatureMap</text:span> to evaluate metric payloads inside the quantum state register distribution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Monolithic Quantum Isolation:</text:span> Bridges native quantum computational files into scalable network services, allowing web architectures to query quantum state evaluations over standard JSON protocols.</text:p>
        </text:list-item>
        <text:list-item>
          <text:p text:style-name="P2"><text:span text:style-name="T1">Algorithm Lifecycle Migration:</text:span> Facilitates automated upgrades from early draft schemas (Dilithium) to permanent standardized post-quantum definitions (ML-DSA) without requiring core database rebuilds.</text:p>
        </text:list-item>
      </text:list>
      <text:h text:style-name="Heading_20_2" text:outline-level="2" text:is-list-header="true">Usage</text:h>
      <text:p text:style-name="P3"># Run the API service instance locally<text:line-break/>python 057_quantum_oracle_api.py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3:47:50.655819700</meta:creation-date>
    <dc:date>2026-05-27T13:47:54.633095200</dc:date>
    <meta:editing-duration>PT4S</meta:editing-duration>
    <meta:editing-cycles>1</meta:editing-cycles>
    <meta:document-statistic meta:table-count="0" meta:image-count="0" meta:object-count="0" meta:page-count="1" meta:paragraph-count="11" meta:word-count="151" meta:character-count="1259" meta:non-whitespace-character-count="1124"/>
    <meta:generator>LibreOffice/26.2.0.3$Windows_X86_64 LibreOffice_project/620$Build-3</meta:generator>
  </office:meta>
</office:document-meta>
</file>