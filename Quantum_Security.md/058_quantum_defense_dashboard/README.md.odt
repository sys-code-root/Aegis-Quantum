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style:font-name="Liberation Mono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phical Quantum Defense Dashboard (Project 058)</text:h>
      <text:p text:style-name="Text_20_body">An advanced graphical interface (GUI) developed via <text:span text:style-name="T1">customtkinter</text:span> that merges background host environment monitoring (Sentinel) with post-quantum lattice signature pipelines.</text:p>
      <text:h text:style-name="Heading_20_2" text:outline-level="2">Technical Explanation</text:h>
      <text:list text:style-name="L1">
        <text:list-item>
          <text:p text:style-name="P1"><text:span text:style-name="T2">CustomTkinter GUI Matrix:</text:span> Builds a modern multi-threaded console interaction grid, isolating backend computation tasks from interface processing rendering routines.</text:p>
        </text:list-item>
        <text:list-item>
          <text:p text:style-name="P1"><text:span text:style-name="T2">Process Watchdog Integration:</text:span> Integrates system hooks using <text:span text:style-name="T1">psutil</text:span> to iterate over system processes, laying down the groundwork to block malicious distractions or non-whitelisted items during critical work blocks.</text:p>
        </text:list-item>
        <text:list-item>
          <text:p text:style-name="P1"><text:span text:style-name="T2">Qiskit 1.x QRNG Harvesting:</text:span> Provisions high-entropy keys on-demand by resolving physical simulation states using randomized Hadamard register distribution model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2">Tool Fragmentation:</text:span> Consolidates loose terminal scripts (process checkers, key-generators, cryptographic testing suites) into a single, cohesive executable hub.</text:p>
        </text:list-item>
        <text:list-item>
          <text:p text:style-name="P2"><text:span text:style-name="T2">Cognitive Overload &amp; Environment Control:</text:span> Streamlines environment auditing through simple visual control panels, creating predictable workspaces tailored for focused engineering tasks.</text:p>
        </text:list-item>
      </text:list>
      <text:h text:style-name="Heading_20_2" text:outline-level="2" text:is-list-header="true">Usage</text:h>
      <text:p text:style-name="P3"># Run the application interface locally<text:line-break/>python 058_quantum_defense_dashboard.py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7T13:50:18.745901400</meta:creation-date>
    <dc:date>2026-05-27T13:50:23.420391100</dc:date>
    <meta:editing-duration>PT4S</meta:editing-duration>
    <meta:editing-cycles>1</meta:editing-cycles>
    <meta:document-statistic meta:table-count="0" meta:image-count="0" meta:object-count="0" meta:page-count="1" meta:paragraph-count="11" meta:word-count="149" meta:character-count="1233" meta:non-whitespace-character-count="1100"/>
    <meta:generator>LibreOffice/26.2.0.3$Windows_X86_64 LibreOffice_project/620$Build-3</meta:generator>
  </office:meta>
</office:document-meta>
</file>