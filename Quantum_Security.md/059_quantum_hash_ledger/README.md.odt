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Quantum-Resistant Hash Ledger (Project 059)</text:h>
      <text:p text:style-name="Text_20_body">A secure cryptographic transactional ledger utilizing the Lamport One-Time Signature (OTS) scheme backed by true bit-by-bit Quantum Random Number Generation (QRNG).</text:p>
      <text:h text:style-name="Heading_20_2" text:outline-level="2">Technical Explanation</text:h>
      <text:list text:style-name="L1">
        <text:list-item>
          <text:p text:style-name="P1"><text:span text:style-name="T1">Lamport Signatures:</text:span> A digital signature scheme where a message hash is signed by revealing selected parts of a private key matrix based on the binary representation of the hash bits.</text:p>
        </text:list-item>
        <text:list-item>
          <text:p text:style-name="P1"><text:span text:style-name="T1">True Random Seeding:</text:span> Avoids software-calculated pseudo-random sequences by sampling individual wave function state collapses ($\alpha|0\rangle + \beta|1\rangle$) over a simulated quantum framework.</text:p>
        </text:list-item>
        <text:list-item>
          <text:p text:style-name="P1"><text:span text:style-name="T1">Shor's Algorithm Immunity:</text:span> Since the security properties scale exclusively with preimage and collision properties of SHA-256, it bypasses the weaknesses of factoring or elliptic curve math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1">Ledger Disruption Defenses:</text:span> Hardens transactional histories against future quantum computers capable of forging standard ECDSA consensus keys.</text:p>
        </text:list-item>
        <text:list-item>
          <text:p text:style-name="P2"><text:span text:style-name="T1">Deterministic Guessing vectors:</text:span> Mitigates vulnerabilities linked to predictable key gen patterns by feeding state configurations using randomized quantum entropy bytes.</text:p>
        </text:list-item>
      </text:list>
      <text:h text:style-name="Heading_20_2" text:outline-level="2" text:is-list-header="true">Usage</text:h>
      <text:p text:style-name="P3">from 059_quantum_hash_ledger import QuantumHashLedger<text:line-break/><text:line-break/># Instantiate the hash ledger<text:line-break/>ledger = QuantumHashLedger()<text:line-break/><text:line-break/># Generate keys, append and sign a data block<text:line-break/>ledger.add_block("Transaction_Data_Payload"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7T13:55:14.515107600</meta:creation-date>
    <dc:date>2026-05-27T13:55:19.147776500</dc:date>
    <meta:editing-duration>PT4S</meta:editing-duration>
    <meta:editing-cycles>1</meta:editing-cycles>
    <meta:document-statistic meta:table-count="0" meta:image-count="0" meta:object-count="0" meta:page-count="1" meta:paragraph-count="11" meta:word-count="173" meta:character-count="1338" meta:non-whitespace-character-count="1179"/>
    <meta:generator>LibreOffice/26.2.0.3$Windows_X86_64 LibreOffice_project/620$Build-3</meta:generator>
  </office:meta>
</office:document-meta>
</file>