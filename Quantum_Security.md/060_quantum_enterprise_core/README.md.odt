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Preformatted_20_Text">
      <style:paragraph-properties fo:margin-top="0cm" fo:margin-bottom="0.499cm" style:contextual-spacing="false"/>
    </style:style>
    <style:style style:name="T1" style:family="text">
      <style:text-properties fo:font-weight="bold"/>
    </style:style>
    <style:style style:name="T2" style:family="text">
      <style:text-properties style:font-name="Liberation Mono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Quantum Enterprise Core Suite (Project 060)</text:h>
      <text:p text:style-name="Text_20_body">An advanced enterprise-ready simulation core featuring blind quantum cloud simulation, unforgeable quantum token verification, risk distribution processing, and dynamic OpenQASM 3.0 hardware transpilation.</text:p>
      <text:h text:style-name="Heading_20_2" text:outline-level="2">Technical Explanation</text:h>
      <text:list text:style-name="L1">
        <text:list-item>
          <text:p text:style-name="P1"><text:span text:style-name="T1">Blind Quantum Processing:</text:span> Simulates multi-party computation protocols where data payloads remain locked from the processing host by leveraging randomized client-side phase rotations ($R_Z$).</text:p>
        </text:list-item>
        <text:list-item>
          <text:p text:style-name="P1"><text:span text:style-name="T1">Hardware Assembly Mapping:</text:span> Uses <text:span text:style-name="T2">qiskit.qasm3</text:span> to compile abstract operations into physical hardware layout assembly definitions, varying cross-qubit optimizations according to whether the physical backend runs on Transmon superconductors or Trapped Ion targets.</text:p>
        </text:list-item>
        <text:list-item>
          <text:p text:style-name="P1"><text:span text:style-name="T1">Quantum Money Mechanics:</text:span> Demonstrates the impossibility of cloning arbitrary unknown quantum states, building verification blocks that detect malicious interception and replication vectors automatically.</text:p>
        </text:list-item>
      </text:list>
      <text:h text:style-name="Heading_20_2" text:outline-level="2" text:is-list-header="true">Problems Solved</text:h>
      <text:list text:style-name="L2">
        <text:list-item>
          <text:p text:style-name="P2"><text:span text:style-name="T1">Cloud Computing Data Leaks:</text:span> Solves privacy challenges in outsourcing quantum algorithms by preventing cloud hardware nodes from intercepting raw proprietary data structures.</text:p>
        </text:list-item>
        <text:list-item>
          <text:p text:style-name="P2"><text:span text:style-name="T1">Cross-Platform Portability Overheads:</text:span> Bypasses manual gate mapping requirements by automating intermediate compilation outputs to OpenQASM 3.0 compliance baselines based on device typology.</text:p>
        </text:list-item>
      </text:list>
      <text:h text:style-name="Heading_20_2" text:outline-level="2" text:is-list-header="true">Usage</text:h>
      <text:p text:style-name="P3">from 060_quantum_enterprise_core import QuantumEnterpriseCore<text:line-break/><text:line-break/># Initialize the enterprise computing pipeline<text:line-break/>engine = QuantumEnterpriseCore()<text:line-break/>qasm_assembly = engine.compile_to_hardware_target("superconductor")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27T13:56:53.918397500</meta:creation-date>
    <dc:date>2026-05-27T13:56:58.032746900</dc:date>
    <meta:editing-duration>PT4S</meta:editing-duration>
    <meta:editing-cycles>1</meta:editing-cycles>
    <meta:document-statistic meta:table-count="0" meta:image-count="0" meta:object-count="0" meta:page-count="1" meta:paragraph-count="11" meta:word-count="177" meta:character-count="1521" meta:non-whitespace-character-count="1359"/>
    <meta:generator>LibreOffice/26.2.0.3$Windows_X86_64 LibreOffice_project/620$Build-3</meta:generator>
  </office:meta>
</office:document-meta>
</file>