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14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</style:style>
    <style:style style:name="P16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style:font-name="Google Sans"/>
    </style:style>
    <style:style style:name="T2" style:family="text">
      <style:text-properties fo:font-weight="bold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/>
    </style:style>
    <style:style style:name="T5" style:family="text">
      <style:text-properties fo:font-style="italic"/>
    </style:style>
    <style:style style:name="T6" style:family="text">
      <style:text-properties style:font-name="Google Sans Tex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curity, Systems &amp; Quantum Computing Architecture</text:h>
      <text:p text:style-name="P2">This repository documents the development of functional tools focused on security engineering, incident response, and post-quantum computing. The portfolio consists of 60 practical projects designed to consolidate low-level concepts, network architecture, and applied cryptography.</text:p>
      <text:h text:style-name="P3" text:outline-level="3">🎯 <text:span text:style-name="T1">Technical Objective</text:span></text:h>
      <text:p text:style-name="P2">The central focus of this laboratory environment is to integrate the stability of classical security systems with next-generation cryptographic paradigms. Each utility has been coded to address real-world vectors in data analysis, code auditing, and infrastructure hardening.</text:p>
      <text:h text:style-name="P3" text:outline-level="3">🛠️ <text:span text:style-name="T1">Technology Stack &amp; Domains</text:span></text:h>
      <text:list text:style-name="L1">
        <text:list-item>
          <text:p text:style-name="P4"><text:span text:style-name="T2">Core Language:</text:span> Python (Advanced Scripting, System Automation, API Engineering).</text:p>
        </text:list-item>
        <text:list-item>
          <text:p text:style-name="P4"><text:span text:style-name="T2">Network &amp; Security:</text:span> Socket Programming, Network Protocols, Packet Reverse Engineering.</text:p>
        </text:list-item>
        <text:list-item>
          <text:p text:style-name="P4"><text:span text:style-name="T2">Incident Response &amp; Forensics:</text:span> Memory Artifact Auditing, Log Parsing, Process Containment.</text:p>
        </text:list-item>
        <text:list-item>
          <text:p text:style-name="P4"><text:span text:style-name="T2">Quantum Computing:</text:span> Qiskit Ecosystem, PQC Algorithms (Kyber, ML-DSA), Quantum Simulation, OpenQASM 3.0.</text:p>
        </text:list-item>
      </text:list>
      <text:h text:style-name="P3" text:outline-level="3" text:is-list-header="true">📂 <text:span text:style-name="T1">Portfolio Organization (60 Projects)</text:span></text:h>
      <text:p text:style-name="P2">The ecosystem is modularly structured into five primary engineering directories:</text:p>
      <text:list text:style-name="L2">
        <text:list-item>
          <text:p text:style-name="P5">🌌 <text:span text:style-name="T3">Quantum/</text:span><text:span text:style-name="T4"> (Quantum Computing)</text:span></text:p>
          <text:list>
            <text:list-item>
              <text:p text:style-name="P6"><text:span text:style-name="T2">Focus:</text:span> Quantum circuit simulation and Post-Quantum Cryptography (PQC) implementation.</text:p>
            </text:list-item>
            <text:list-item>
              <text:p text:style-name="P6"><text:span text:style-name="T2">Highlights:</text:span> Key distribution protocols (BB84, E91), Variational Quantum Algorithms (VQA), state mapping (Amplitude/Angle Encoding), and low-level compilation for real hardware via OpenQASM 3.0.</text:p>
            </text:list-item>
          </text:list>
        </text:list-item>
        <text:list-item>
          <text:p text:style-name="P5">🚨 <text:span text:style-name="T3">Incidence/</text:span><text:span text:style-name="T4"> (Incident Response)</text:span></text:p>
          <text:list>
            <text:list-item>
              <text:p text:style-name="P6"><text:span text:style-name="T2">Focus:</text:span> Dynamic automation tools and active threat containment at runtime.</text:p>
            </text:list-item>
            <text:list-item>
              <text:p text:style-name="P6"><text:span text:style-name="T2">Highlights:</text:span> OS integrity monitoring watchdogs, containment scripts, and authorization/whitelist-based process isolation.</text:p>
            </text:list-item>
          </text:list>
        </text:list-item>
        <text:list-item>
          <text:p text:style-name="P5">🔍 <text:span text:style-name="T3">Forensics/</text:span><text:span text:style-name="T4"> (Digital Forensics)</text:span></text:p>
          <text:list>
            <text:list-item>
              <text:p text:style-name="P6"><text:span text:style-name="T2">Focus:</text:span> Static auditing, metadata extraction, and post-event digital forensics.</text:p>
            </text:list-item>
            <text:list-item>
              <text:p text:style-name="P6"><text:span text:style-name="T2">Highlights:</text:span> Automated system log capture and parsing, file hash verification, header recovery, and structural data integrity checks.</text:p>
            </text:list-item>
          </text:list>
        </text:list-item>
        <text:list-item>
          <text:p text:style-name="P5">🌐 <text:span text:style-name="T3">Network/</text:span><text:span text:style-name="T4"> (Network Engineering)</text:span></text:p>
          <text:list>
            <text:list-item>
              <text:p text:style-name="P6"><text:soft-page-break/><text:span text:style-name="T2">Focus:</text:span> Low-level socket communication and programmatic traffic interception.</text:p>
            </text:list-item>
            <text:list-item>
              <text:p text:style-name="P6"><text:span text:style-name="T2">Highlights:</text:span> Development of custom TCP/UDP clients and servers, parallel port scanners, raw packet analyzers, and native protocol implementations.</text:p>
            </text:list-item>
          </text:list>
        </text:list-item>
        <text:list-item>
          <text:p text:style-name="P5">🛡️ <text:span text:style-name="T3">Security/</text:span><text:span text:style-name="T4"> (Applied Cyber Security)</text:span></text:p>
          <text:list>
            <text:list-item>
              <text:p text:style-name="P6"><text:span text:style-name="T2">Focus:</text:span> Classical symmetric/asymmetric cryptography and defensive system automation.</text:p>
            </text:list-item>
            <text:list-item>
              <text:p text:style-name="P6"><text:span text:style-name="T2">Highlights:</text:span> Batch encryption engines using AES-GCM and SHA-256, local digital signature generators, hash-based credential managers, and secure infrastructures powered by FastAPI.</text:p>
            </text:list-item>
          </text:list>
        </text:list-item>
      </text:list>
      <text:h text:style-name="P3" text:outline-level="3" text:is-list-header="true">⚛️ <text:span text:style-name="T1">Quantum Computing &amp; Cryptography Roadmap</text:span></text:h>
      <text:p text:style-name="P2">This roadmap details the conceptual and practical progression applied in developing the laboratory's quantum module, ranging from mathematical foundations to the simulation of advanced security protocols.</text:p>
      <text:h text:style-name="P7" text:outline-level="4">🧠 <text:span text:style-name="T1">Module 1: Foundations &amp; Quantum Intuition</text:span></text:h>
      <text:list text:style-name="L3">
        <text:list-item>
          <text:p text:style-name="P8"><text:span text:style-name="T2">Bit vs. Qubit Transition:</text:span> Conceptual shift from deterministic binary to state probability (the "spinning coin" analogy).</text:p>
        </text:list-item>
        <text:list-item>
          <text:p text:style-name="P8"><text:span text:style-name="T2">Superposition &amp; Entanglement:</text:span> Understanding "spooky action at a distance" and quantum state co-existence.</text:p>
        </text:list-item>
        <text:list-item>
          <text:p text:style-name="P8"><text:span text:style-name="T2">Geometric Representation:</text:span> Mastery of the Bloch Sphere and State Vectors ($\lvert0\rangle$ and $\lvert1\rangle$).</text:p>
        </text:list-item>
        <text:list-item>
          <text:p text:style-name="P8"><text:span text:style-name="T2">Mathematical Prerequisites:</text:span> Fundamental review of Linear Algebra, Matrices, and Complex Numbers.</text:p>
        </text:list-item>
      </text:list>
      <text:h text:style-name="P7" text:outline-level="4">🎛️ <text:span text:style-name="T1">Module 2: Quantum Circuits &amp; Gates</text:span></text:h>
      <text:list text:style-name="L4">
        <text:list-item>
          <text:p text:style-name="P9"><text:span text:style-name="T2">Single-Qubit Gates:</text:span> Logical operations using the X-gate (Quantum NOT), Z-gate (Phase flip), and Hadamard (H) gate for state superposition.</text:p>
        </text:list-item>
        <text:list-item>
          <text:p text:style-name="P9"><text:span text:style-name="T2">Multi-Qubit Gates:</text:span> Operational logic of the CNOT gate for conditional control and entanglement generation.</text:p>
        </text:list-item>
        <text:list-item>
          <text:p text:style-name="P9"><text:span text:style-name="T2">Practical Circuit Manipulation:</text:span> Implementation of quantum circuits using Python-based frameworks (Qiskit / Cirq).</text:p>
        </text:list-item>
      </text:list>
      <text:h text:style-name="P7" text:outline-level="4">🛡️ <text:span text:style-name="T1">Module 3: Security Protocols &amp; Quantum Engineering (Advanced)</text:span></text:h>
      <text:list text:style-name="L5">
        <text:list-item>
          <text:p text:style-name="P10"><text:span text:style-name="T2">BB84 Protocol Simulation:</text:span> Implementation of Quantum Key Distribution (QKD) for secure communication.</text:p>
        </text:list-item>
        <text:list-item>
          <text:p text:style-name="P10"><text:span text:style-name="T2">Shor’s Algorithm Analysis:</text:span> Assessing the impact of quantum factorization on classical asymmetric cryptographic infrastructure.</text:p>
        </text:list-item>
        <text:list-item>
          <text:p text:style-name="P10"><text:span text:style-name="T2">Grover’s Algorithm:</text:span> Utilizing quantum amplitude amplification for database search acceleration.</text:p>
        </text:list-item>
        <text:list-item>
          <text:p text:style-name="P10"><text:soft-page-break/><text:span text:style-name="T2">Quantum Engineering Techniques:</text:span> Circuit Knitting and software-based noise mitigation/error suppression.</text:p>
        </text:list-item>
      </text:list>
      <text:h text:style-name="P3" text:outline-level="3" text:is-list-header="true">📚 <text:span text:style-name="T1">Research References &amp; Foundation Materials</text:span></text:h>
      <text:p text:style-name="P2">This hub centralizes scientific articles, official documentation, and open-access materials that served as the theoretical and technical foundation for this portfolio’s algorithm architecture.</text:p>
      <text:h text:style-name="P7" text:outline-level="4">🔬 <text:span text:style-name="T1">Quantum Computing &amp; Physics Research</text:span></text:h>
      <text:list text:style-name="L6">
        <text:list-item>
          <text:p text:style-name="P11"><text:span text:style-name="T3">A Gentle Introduction to Quantum Computing</text:span><text:span text:style-name="T4"> (</text:span><text:a xlink:type="simple" xlink:href="https://arxiv.org/pdf/1803.07095.pdf" office:target-frame-name="_blank" xlink:show="new" text:style-name="Internet_20_link" text:visited-style-name="Visited_20_Internet_20_Link"><text:span text:style-name="T4">arXiv:1803.07095</text:span></text:a><text:span text:style-name="T4">)</text:span></text:p>
          <text:list>
            <text:list-item>
              <text:p text:style-name="P12"><text:span text:style-name="T5">Authors:</text:span> J. Eleanor Rieffel, Wolfgang Polak.</text:p>
            </text:list-item>
            <text:list-item>
              <text:p text:style-name="P12"><text:span text:style-name="T5">Portfolio Application:</text:span> Provided a rigorous didactic mapping of fundamental quantum concepts—qubits, dense matrices, and unitary quantum operators—free from unnecessary commercial jargon.</text:p>
            </text:list-item>
          </text:list>
        </text:list-item>
        <text:list-item>
          <text:p text:style-name="P11"><text:span text:style-name="T3">An Introduction to Quantum Computing for Non-Physicists</text:span><text:span text:style-name="T4"> (</text:span><text:a xlink:type="simple" xlink:href="https://arxiv.org/pdf/quant-ph/0611216.pdf" office:target-frame-name="_blank" xlink:show="new" text:style-name="Internet_20_link" text:visited-style-name="Visited_20_Internet_20_Link"><text:span text:style-name="T4">arXiv:quant-ph/0611216</text:span></text:a><text:span text:style-name="T4">)</text:span></text:p>
          <text:list>
            <text:list-item>
              <text:p text:style-name="P12"><text:span text:style-name="T5">Portfolio Application:</text:span> Conceptual baseline used to translate complex physical phenomena (superposition, quantum logic gates, and circuits) into structured logic for computer scientists and software engineers.</text:p>
            </text:list-item>
          </text:list>
        </text:list-item>
        <text:list-item>
          <text:p text:style-name="P11"><text:span text:style-name="T3">Cloud Quantum Computing of an Atomic Nucleus</text:span><text:span text:style-name="T4"> (</text:span><text:a xlink:type="simple" xlink:href="https://arxiv.org/pdf/1801.03897.pdf" office:target-frame-name="_blank" xlink:show="new" text:style-name="Internet_20_link" text:visited-style-name="Visited_20_Internet_20_Link"><text:span text:style-name="T4">arXiv:1801.03897</text:span></text:a><text:span text:style-name="T4">)</text:span></text:p>
          <text:list>
            <text:list-item>
              <text:p text:style-name="P12"><text:span text:style-name="T5">Authors:</text:span> E. F. Dumitrescu, et al.</text:p>
            </text:list-item>
            <text:list-item>
              <text:p text:style-name="P12"><text:span text:style-name="T5">Portfolio Application:</text:span> Practical case study demonstrating real-world cloud-based quantum processing (IBM Quantum) to compute the deuteron atomic nucleus energy—bridge between nuclear physics and raw code.</text:p>
            </text:list-item>
          </text:list>
        </text:list-item>
        <text:list-item>
          <text:p text:style-name="P11"><text:span text:style-name="T3">Foundations of Quantum Thermodynamics</text:span><text:span text:style-name="T4"> (</text:span><text:a xlink:type="simple" xlink:href="https://arxiv.org/pdf/cond-mat/0411130.pdf" office:target-frame-name="_blank" xlink:show="new" text:style-name="Internet_20_link" text:visited-style-name="Visited_20_Internet_20_Link"><text:span text:style-name="T4">arXiv:cond-mat/0411130</text:span></text:a><text:span text:style-name="T4">)</text:span></text:p>
          <text:list>
            <text:list-item>
              <text:p text:style-name="P12"><text:span text:style-name="T5">Authors:</text:span> J. Gemmer, M. Michel.</text:p>
            </text:list-item>
            <text:list-item>
              <text:p text:style-name="P12"><text:span text:style-name="T5">Portfolio Application:</text:span> Theoretical grounding in the exact intersection between classical thermodynamic laws (entropy) and microscopically regulated quantum mechanical systems.</text:p>
            </text:list-item>
          </text:list>
        </text:list-item>
        <text:list-item>
          <text:p text:style-name="P11"><text:span text:style-name="T3">Introduction to Quantum Computing</text:span><text:span text:style-name="T4"> (</text:span><text:a xlink:type="simple" xlink:href="https://arxiv.org/pdf/2103.11174.pdf" office:target-frame-name="_blank" xlink:show="new" text:style-name="Internet_20_link" text:visited-style-name="Visited_20_Internet_20_Link"><text:span text:style-name="T4">arXiv:2103.11174</text:span></text:a><text:span text:style-name="T4">)</text:span></text:p>
          <text:list>
            <text:list-item>
              <text:p text:style-name="P12"><text:span text:style-name="T5">Author:</text:span> Noson S. Yanofsky.</text:p>
            </text:list-item>
            <text:list-item>
              <text:p text:style-name="P12"><text:span text:style-name="T5">Portfolio Application:</text:span> Detailed consultation on fundamental logical structures, tensors, and matrix multiplication applied to algorithmic construction.</text:p>
            </text:list-item>
          </text:list>
        </text:list-item>
        <text:list-item>
          <text:p text:style-name="P11"><text:span text:style-name="T3">Quantum Computing in the Classroom</text:span><text:span text:style-name="T4"> (</text:span><text:a xlink:type="simple" xlink:href="https://arxiv.org/pdf/1903.04359.pdf" office:target-frame-name="_blank" xlink:show="new" text:style-name="Internet_20_link" text:visited-style-name="Visited_20_Internet_20_Link"><text:span text:style-name="T4">arXiv:1903.04359</text:span></text:a><text:span text:style-name="T4">)</text:span></text:p>
          <text:list>
            <text:list-item>
              <text:p text:style-name="P12"><text:span text:style-name="T5">Authors:</text:span> de Wolf, et al.</text:p>
            </text:list-item>
            <text:list-item>
              <text:p text:style-name="P12"><text:span text:style-name="T5">Portfolio Application:</text:span> Pedagogical resource used to abstract highly complex concepts—such as quantum entanglement and the mathematics of the Hadamard gate—into practical software engineering logic.</text:p>
            </text:list-item>
          </text:list>
        </text:list-item>
        <text:list-item>
          <text:p text:style-name="P11"><text:soft-page-break/><text:span text:style-name="T3">Quantum Simulation of Nuclear Physics</text:span><text:span text:style-name="T4"> (</text:span><text:a xlink:type="simple" xlink:href="https://arxiv.org/pdf/2004.12442.pdf" office:target-frame-name="_blank" xlink:show="new" text:style-name="Internet_20_link" text:visited-style-name="Visited_20_Internet_20_Link"><text:span text:style-name="T4">arXiv:2004.12442</text:span></text:a><text:span text:style-name="T4">)</text:span></text:p>
          <text:list>
            <text:list-item>
              <text:p text:style-name="P12"><text:span text:style-name="T5">Portfolio Application:</text:span> Review of global scientific methodologies for mapping the physical properties of protons, neutrons, and strong nuclear force interactions using structured qubit arrays.</text:p>
            </text:list-item>
          </text:list>
        </text:list-item>
      </text:list>
      <text:h text:style-name="P7" text:outline-level="4">🖥️ <text:span text:style-name="T1">Official Development Documentation</text:span></text:h>
      <text:list text:style-name="L7">
        <text:list-item>
          <text:p text:style-name="P13">Python Official Documentation &amp; Tutorial</text:p>
          <text:list>
            <text:list-item>
              <text:p text:style-name="P14"><text:span text:style-name="T5">Maintainer:</text:span> Python Software Foundation (PSF).</text:p>
            </text:list-item>
            <text:list-item>
              <text:p text:style-name="P14"><text:span text:style-name="T5">Portfolio Application:</text:span> Definitive standard for script structure, indentation rules, native collection handling, and classical programming logic.</text:p>
            </text:list-item>
          </text:list>
        </text:list-item>
        <text:list-item>
          <text:p text:style-name="P13">Qiskit Official Documentation (IBM Quantum)</text:p>
          <text:list>
            <text:list-item>
              <text:p text:style-name="P14"><text:span text:style-name="T5">Maintainer:</text:span> IBM Quantum Team.</text:p>
            </text:list-item>
            <text:list-item>
              <text:p text:style-name="P14"><text:span text:style-name="T5">Portfolio Application:</text:span> Central development portal utilized for adhering to the latest guidelines and coding standards for constructing, simulating, and executing quantum circuits (Qiskit 1.0+ standard).</text:p>
            </text:list-item>
          </text:list>
        </text:list-item>
      </text:list>
      <text:p text:style-name="P15">💡 <text:span text:style-name="T6">Note: All provided links point to open-access repositories, ensuring full transparency and validation of the research foundations for any auditor of this portfolio.</text:span></text:p>
      <text:h text:style-name="P3" text:outline-level="3">🔗 <text:span text:style-name="T1">Contact and Collaboration</text:span></text:h>
      <text:list text:style-name="L8">
        <text:list-item>
          <text:p text:style-name="P16"><text:span text:style-name="T2">E-mail:</text:span> directcontact2027@gmail.com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5:34:05.947830000</meta:creation-date>
    <dc:date>2026-06-02T11:19:23.520207400</dc:date>
    <meta:editing-duration>PT2H18M14S</meta:editing-duration>
    <meta:editing-cycles>7</meta:editing-cycles>
    <meta:generator>LibreOffice/26.2.0.3$Windows_X86_64 LibreOffice_project/620$Build-3</meta:generator>
    <meta:document-statistic meta:table-count="0" meta:image-count="0" meta:object-count="0" meta:page-count="4" meta:paragraph-count="74" meta:word-count="912" meta:character-count="7055" meta:non-whitespace-character-count="6278"/>
  </office:meta>
</office:document-meta>
</file>