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fo:font-weight="bold"/>
    </style:style>
    <style:style style:name="T2" style:family="text">
      <style:text-properties style:font-name="Liberation Mono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yber Report &amp; Archive Tool (Project 025)</text:h>
      <text:p text:style-name="Text_20_body">An operational data management utility designed to handle the persistence lifecycle of database entries, allowing for portable reporting (CSV) and raw data archival (Pickle).</text:p>
      <text:h text:style-name="Heading_20_2" text:outline-level="2">Technical Explanation</text:h>
      <text:list text:style-name="L1">
        <text:list-item>
          <text:p text:style-name="P1"><text:span text:style-name="T1">Data Serialization:</text:span> Transforms relational database records into CSV structures for human-readable reporting and spreadsheet integration.</text:p>
        </text:list-item>
        <text:list-item>
          <text:p text:style-name="P1"><text:span text:style-name="T1">Object Persistence:</text:span> Uses Python’s <text:span text:style-name="T2">pickle</text:span> library to serialize complex data lists into binary blobs, allowing for exact state restoration of security targets without needing a SQL engine present.</text:p>
        </text:list-item>
        <text:list-item>
          <text:p text:style-name="P1"><text:span text:style-name="T1">Redundancy Management:</text:span> Ensures that all intelligence collected throughout operational cycles is backed up, preventing accidental data loss during system wipes or directory rotations.</text:p>
        </text:list-item>
      </text:list>
      <text:h text:style-name="Heading_20_2" text:outline-level="2" text:is-list-header="true">Problems Solved</text:h>
      <text:list text:style-name="L2">
        <text:list-item>
          <text:p text:style-name="P2"><text:span text:style-name="T1">Reporting Latency:</text:span> Automates the extraction of scanner data into spreadsheets, significantly reducing the time spent generating audit reports.</text:p>
        </text:list-item>
        <text:list-item>
          <text:p text:style-name="P2"><text:span text:style-name="T1">Offline Data Recovery:</text:span> Provides a secondary recovery mechanism (<text:span text:style-name="T2">.pkl</text:span>) to reconstruct the scan database even if the SQL primary database file suffers corruption.</text:p>
        </text:list-item>
      </text:list>
      <text:h text:style-name="Heading_20_2" text:outline-level="2" text:is-list-header="true">Usage</text:h>
      <text:p text:style-name="P3">from 025_cyber_archive import CyberArchive<text:line-break/><text:line-break/># Initialize archival system<text:line-break/>vault = CyberArchive("security_vault.db")<text:line-break/><text:line-break/># Run full monthly data persistence lifecycle<text:line-break/>vault.export_to_csv("monthly_audit.csv")<text:line-break/>vault.backup_objects_pickle("monthly_backup.pkl")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4T22:12:59.590395000</meta:creation-date>
    <dc:date>2026-05-24T22:13:11.031331000</dc:date>
    <meta:editing-duration>PT12S</meta:editing-duration>
    <meta:editing-cycles>1</meta:editing-cycles>
    <meta:document-statistic meta:table-count="0" meta:image-count="0" meta:object-count="0" meta:page-count="1" meta:paragraph-count="11" meta:word-count="168" meta:character-count="1329" meta:non-whitespace-character-count="1175"/>
    <meta:generator>LibreOffice/26.2.0.3$Windows_X86_64 LibreOffice_project/620$Build-3</meta:generator>
  </office:meta>
</office:document-meta>
</file>