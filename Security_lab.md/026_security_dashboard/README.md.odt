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curity Dashboard Framework (Project 026)</text:h>
      <text:p text:style-name="Text_20_body">A graphical user interface (GUI) framework designed to act as a central controller for the various Python modules within the Security Lab, providing visual feedback and parameter selection.</text:p>
      <text:h text:style-name="Heading_20_2" text:outline-level="2">Technical Explanation</text:h>
      <text:list text:style-name="L1">
        <text:list-item>
          <text:p text:style-name="P1"><text:span text:style-name="T1">Event-Driven Architecture:</text:span> Utilizes the Tkinter main loop to manage GUI rendering and asynchronous event handling.</text:p>
        </text:list-item>
        <text:list-item>
          <text:p text:style-name="P1"><text:span text:style-name="T1">State Management:</text:span> Maps user interactions (Checkbuttons) to <text:span text:style-name="T2">BooleanVar</text:span> states, allowing for dynamic configuration of backend tools before execution.</text:p>
        </text:list-item>
        <text:list-item>
          <text:p text:style-name="P1"><text:span text:style-name="T1">Synchronous Progress Tracking:</text:span> Implements <text:span text:style-name="T2">ttk.Progressbar</text:span> with manual IDLE task updates to provide real-time visual status reports during intensive I/O operations (scanning/sniffing)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Operator Cognitive Load:</text:span> Simplifies complex command-line tool usage into a single, cohesive dashboard, reducing errors in configuration inputs.</text:p>
        </text:list-item>
        <text:list-item>
          <text:p text:style-name="P2"><text:span text:style-name="T1">Operational Visibility:</text:span> Provides visual progress markers for long-running scripts (like network inventory or forensic triage), preventing the perception of system freezes.</text:p>
        </text:list-item>
        <text:list-item>
          <text:p text:style-name="P2"><text:span text:style-name="T1">Unified Interface:</text:span> Acts as the integration point for all Lab scripts, transforming individual tools into a cohesive operational security system.</text:p>
        </text:list-item>
      </text:list>
      <text:h text:style-name="Heading_20_2" text:outline-level="2" text:is-list-header="true">Usage</text:h>
      <text:p text:style-name="P3">from 026_security_dashboard import SecurityDashboard<text:line-break/><text:line-break/># Initialize and launch the main operational GUI<text:line-break/>dashboard = SecurityDashboard()<text:line-break/>dashboard.run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22:19:13.691507600</meta:creation-date>
    <dc:date>2026-05-24T22:19:26.293812800</dc:date>
    <meta:editing-duration>PT12S</meta:editing-duration>
    <meta:editing-cycles>1</meta:editing-cycles>
    <meta:document-statistic meta:table-count="0" meta:image-count="0" meta:object-count="0" meta:page-count="1" meta:paragraph-count="12" meta:word-count="173" meta:character-count="1333" meta:non-whitespace-character-count="1177"/>
    <meta:generator>LibreOffice/26.2.0.3$Windows_X86_64 LibreOffice_project/620$Build-3</meta:generator>
  </office:meta>
</office:document-meta>
</file>