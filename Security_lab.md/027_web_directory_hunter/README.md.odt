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b Directory Hunter &amp; Path Auditor (Project 027)</text:h>
      <text:p text:style-name="Text_20_body">A web interface assessment utility designed to look for hidden directory structures, forgotten backup logs, or unprotected administration endpoints on a target web server.</text:p>
      <text:h text:style-name="Heading_20_2" text:outline-level="2">Technical Explanation</text:h>
      <text:list text:style-name="L1">
        <text:list-item>
          <text:p text:style-name="P1"><text:span text:style-name="T1">HTTP Status Code Mapping:</text:span> Inspects operational HTTP response codes directly from the host (<text:span text:style-name="T2">200 OK</text:span> vs <text:span text:style-name="T2">403 Forbidden</text:span>) to map server directory structures.</text:p>
        </text:list-item>
        <text:list-item>
          <text:p text:style-name="P1"><text:span text:style-name="T1">Wordlist Stream Ingestion:</text:span> Streams flat-text dictionary elements line-by-line to execute structural directory testing without creating large memory buffers.</text:p>
        </text:list-item>
        <text:list-item>
          <text:p text:style-name="P1"><text:span text:style-name="T1">Network Exception Isolation:</text:span> Incorporates localized exception shielding to handle network connection issues cleanly without interrupting the ongoing scan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Unprotected Artifact Exposure:</text:span> Helps web administrators locate exposed diagnostic scripts (<text:span text:style-name="T2">info.php</text:span>), configuration backups (<text:span text:style-name="T2">.bak</text:span>), or old source code zip archives.</text:p>
        </text:list-item>
        <text:list-item>
          <text:p text:style-name="P2"><text:span text:style-name="T1">Access Control Validation:</text:span> Validates whether restricted administrative paths actually block unauthenticated users with a proper <text:span text:style-name="T2">403 Forbidden</text:span> status code.</text:p>
        </text:list-item>
        <text:list-item>
          <text:p text:style-name="P2"><text:span text:style-name="T1">Information Leakage Triage:</text:span> Identifies non-indexed paths that are left reachable, reducing the attack surface before deployment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Protocol Method</text:span></text:p>
          </table:table-cell>
          <table:table-cell table:style-name="Tabela1.A2" office:value-type="string">
            <text:p text:style-name="Table_20_Contents"><text:span text:style-name="T2">requests.get</text:span> Method</text:p>
          </table:table-cell>
          <table:table-cell table:style-name="Tabela1.C2" office:value-type="string">
            <text:p text:style-name="P4">Standard choice for simple path auditing, ensuring the application processes standard responses accurately.</text:p>
          </table:table-cell>
        </table:table-row>
        <table:table-row>
          <table:table-cell table:style-name="Tabela1.A2" office:value-type="string">
            <text:p text:style-name="Table_20_Contents"><text:span text:style-name="T1">Timeout Boundary</text:span></text:p>
          </table:table-cell>
          <table:table-cell table:style-name="Tabela1.A2" office:value-type="string">
            <text:p text:style-name="P4">3-Second Rule</text:p>
          </table:table-cell>
          <table:table-cell table:style-name="Tabela1.C2" office:value-type="string">
            <text:p text:style-name="P4">Balances validation accuracy with execution speed, avoiding long delays from hanging scripts or slow endpoints.</text:p>
          </table:table-cell>
        </table:table-row>
      </table:table>
      <text:p text:style-name="Text_20_body"/>
      <text:h text:style-name="Heading_20_2" text:outline-level="2">Usage</text:h>
      <text:p text:style-name="P5">from 027_web_directory_hunter import WebDirectoryHunter<text:line-break/><text:line-break/># Instantiate the auditor on a local development server<text:line-break/>auditor = WebDirectoryHunter("http://localhost:8080")<text:line-break/><text:line-break/># Run the discovery engine against a standard test list<text:line-break/>auditor.scan("wordlist.txt"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5T10:07:42.415315900</meta:creation-date>
    <dc:date>2026-05-25T10:07:47.728292600</dc:date>
    <meta:editing-duration>PT6S</meta:editing-duration>
    <meta:editing-cycles>1</meta:editing-cycles>
    <meta:document-statistic meta:table-count="1" meta:image-count="0" meta:object-count="0" meta:page-count="1" meta:paragraph-count="22" meta:word-count="230" meta:character-count="1772" meta:non-whitespace-character-count="1568"/>
    <meta:generator>LibreOffice/26.2.0.3$Windows_X86_64 LibreOffice_project/620$Build-3</meta:generator>
  </office:meta>
</office:document-meta>
</file>