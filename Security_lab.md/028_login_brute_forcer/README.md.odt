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ogin Dictionary Brute Forcer (Project 028)</text:h>
      <text:p text:style-name="Text_20_body">A security utility designed for authentication auditing and credential strength validation. It identifies vulnerabilities in login interfaces by simulating dictionary-based credential attacks.</text:p>
      <text:h text:style-name="Heading_20_2" text:outline-level="2">Technical Explanation</text:h>
      <text:list text:style-name="L1">
        <text:list-item>
          <text:p text:style-name="P1"><text:span text:style-name="T1">POST Request Injection:</text:span> Manually crafts authentication payloads (<text:span text:style-name="T2">username</text:span>/<text:span text:style-name="T2">password</text:span>) and submits them via HTTP POST to the backend server.</text:p>
        </text:list-item>
        <text:list-item>
          <text:p text:style-name="P1"><text:span text:style-name="T1">Failure Pattern Matching:</text:span> Evaluates server responses against a predefined <text:span text:style-name="T2">error_message</text:span> string, allowing the tool to distinguish between authenticated sessions and rejected attempts.</text:p>
        </text:list-item>
        <text:list-item>
          <text:p text:style-name="P1"><text:span text:style-name="T1">Payload Iteration:</text:span> Streams credential candidates from a flat-text dictionary to perform rapid testing without exhausting system memory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Weak Credential Identification:</text:span> Exposes accounts that utilize passwords present in standard dictionary files (e.g., 'password123', 'admin').</text:p>
        </text:list-item>
        <text:list-item>
          <text:p text:style-name="P2"><text:span text:style-name="T1">Brute-Force Policy Verification:</text:span> Tests whether the target server implements account lockout thresholds or rate-limiting strategies effectively.</text:p>
        </text:list-item>
        <text:list-item>
          <text:p text:style-name="P2"><text:span text:style-name="T1">Authentication Boundary Audit:</text:span> Confirms if the application correctly validates inputs before granting session cookies.</text:p>
        </text:list-item>
      </text:list>
      <text:h text:style-name="Heading_20_2" text:outline-level="2" text:is-list-header="true">Usage</text:h>
      <text:p text:style-name="P3">from 028_login_brute_forcer import LoginBruteForcer<text:line-break/><text:line-break/># Setup the auditor targeting a local development endpoint<text:line-break/>auditor = LoginBruteForcer("[http://127.0.0.1/login](http://127.0.0.1/login)", "admin")<text:line-break/><text:line-break/># Perform the authentication strength sweep<text:line-break/>auditor.crack("passwords.txt"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10:13:28.609037800</meta:creation-date>
    <dc:date>2026-05-25T10:13:36.667284500</dc:date>
    <meta:editing-duration>PT8S</meta:editing-duration>
    <meta:editing-cycles>1</meta:editing-cycles>
    <meta:document-statistic meta:table-count="0" meta:image-count="0" meta:object-count="0" meta:page-count="1" meta:paragraph-count="12" meta:word-count="166" meta:character-count="1415" meta:non-whitespace-character-count="1265"/>
    <meta:generator>LibreOffice/26.2.0.3$Windows_X86_64 LibreOffice_project/620$Build-3</meta:generator>
  </office:meta>
</office:document-meta>
</file>