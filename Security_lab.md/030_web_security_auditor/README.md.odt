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4d39d"/>
    </style:style>
    <style:style style:name="P2" style:family="paragraph" style:parent-style-name="Text_20_body">
      <style:text-properties officeooo:paragraph-rsid="0014d39d"/>
    </style:style>
    <style:style style:name="P3" style:family="paragraph" style:parent-style-name="Heading_20_2">
      <style:text-properties officeooo:paragraph-rsid="0014d39d"/>
    </style:style>
    <style:style style:name="P4" style:family="paragraph" style:parent-style-name="Text_20_body" style:list-style-name="L1">
      <style:text-properties officeooo:paragraph-rsid="0014d39d"/>
    </style:style>
    <style:style style:name="P5" style:family="paragraph" style:parent-style-name="Text_20_body" style:list-style-name="L2">
      <style:text-properties officeooo:paragraph-rsid="0014d39d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4d39d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eb Security Auditor (Project 030)</text:h>
      <text:p text:style-name="P2">An automated configuration assessment tool that audits web servers for the presence of hardening headers and secure cookie attributes.</text:p>
      <text:h text:style-name="P3" text:outline-level="2">Technical Explanation</text:h>
      <text:list text:style-name="L1">
        <text:list-item>
          <text:p text:style-name="P4"><text:span text:style-name="T1">Header Hardening Verification:</text:span> Compares the target site’s response against a predefined security manifest, flagging absent headers that expose the site to well-known attack vectors (e.g., Clickjacking).</text:p>
        </text:list-item>
        <text:list-item>
          <text:p text:style-name="P4"><text:span text:style-name="T1">Cookie Attribute Audit:</text:span> Inspects session tokens for the <text:span text:style-name="T2">HttpOnly</text:span> flag, a critical defense against XSS-based session hijacking.</text:p>
        </text:list-item>
        <text:list-item>
          <text:p text:style-name="P4"><text:span text:style-name="T1">HEAD-Request Efficiency:</text:span> Utilizes HTTP HEAD requests to perform rapid audits without the overhead of downloading multi-megabyte HTML page bodies.</text:p>
        </text:list-item>
      </text:list>
      <text:h text:style-name="P3" text:outline-level="2" text:is-list-header="true">Problems Solved</text:h>
      <text:list text:style-name="L2">
        <text:list-item>
          <text:p text:style-name="P5"><text:span text:style-name="T1">Security Policy Gaps:</text:span> Quickly identifies misconfigured servers that fail to implement industry-standard defenses like HSTS or CSP.</text:p>
        </text:list-item>
        <text:list-item>
          <text:p text:style-name="P5"><text:span text:style-name="T1">Session Token Exfiltration Risks:</text:span> Detects if cookies are susceptible to being stolen by malicious JavaScript due to missing browser protection flags.</text:p>
        </text:list-item>
      </text:list>
      <text:h text:style-name="P3" text:outline-level="2" text:is-list-header="true">Usage</text:h>
      <text:p text:style-name="P6">from 030_web_security_auditor import SecurityHeaderAuditor<text:line-break/><text:line-break/># Perform a hardening audit on a target web service<text:line-break/>auditor = SecurityHeaderAuditor("[https://example.com](https://example.com)")<text:line-break/>auditor.audit()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0:21:38.426658200</meta:creation-date>
    <dc:date>2026-05-25T10:21:47.759581500</dc:date>
    <meta:editing-duration>PT9S</meta:editing-duration>
    <meta:editing-cycles>1</meta:editing-cycles>
    <meta:document-statistic meta:table-count="0" meta:image-count="0" meta:object-count="0" meta:page-count="1" meta:paragraph-count="11" meta:word-count="152" meta:character-count="1173" meta:non-whitespace-character-count="1036"/>
    <meta:generator>LibreOffice/26.2.0.3$Windows_X86_64 LibreOffice_project/620$Build-3</meta:generator>
  </office:meta>
</office:document-meta>
</file>