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mail Hunter &amp; OSINT Harvester (Project 031)</text:h>
      <text:p text:style-name="Text_20_body">A reconnaissance utility designed to scrape website source code for exposed email addresses, facilitating the identification of communication vectors for intelligence or security audits.</text:p>
      <text:h text:style-name="Heading_20_2" text:outline-level="2">Technical Explanation</text:h>
      <text:list text:style-name="L1">
        <text:list-item>
          <text:p text:style-name="P1"><text:span text:style-name="T1">Pattern Matching:</text:span> Utilizes Regular Expressions (Regex) to scan unstructured text blocks for standardized e-mail naming conventions.</text:p>
        </text:list-item>
        <text:list-item>
          <text:p text:style-name="P1"><text:span text:style-name="T1">Operational Disguise:</text:span> Implements custom User-Agent headers to perform collection tasks in a standard browser-like format.</text:p>
        </text:list-item>
        <text:list-item>
          <text:p text:style-name="P1"><text:span text:style-name="T1">Deduplication Logic:</text:span> Employs Python <text:span text:style-name="T2">set</text:span> structures to normalize output data, ensuring each contact artifact is represented only once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Attack Surface Mapping:</text:span> Helps identify what contact points are visible to potential threat actors, informing decisions on obfuscating email addresses.</text:p>
        </text:list-item>
        <text:list-item>
          <text:p text:style-name="P2"><text:span text:style-name="T1">Contact Intelligence:</text:span> Aggregates contact information for security teams to conduct outreach, audits, or verification of site ownership.</text:p>
        </text:list-item>
      </text:list>
      <text:h text:style-name="Heading_20_2" text:outline-level="2" text:is-list-header="true">Usage</text:h>
      <text:p text:style-name="P3">from 031_email_hunter import EmailHunter<text:line-break/><text:line-break/># Initiate reconnaissance on a target organizational site<text:line-break/>hunter = EmailHunter("[https://example.com/contact](https://example.com/contact)")<text:line-break/><text:line-break/># Execute harvester sweep<text:line-break/>hunter.hunt(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5T10:24:05.086428900</meta:creation-date>
    <dc:date>2026-05-25T10:24:09.016052500</dc:date>
    <meta:editing-duration>PT4S</meta:editing-duration>
    <meta:editing-cycles>1</meta:editing-cycles>
    <meta:document-statistic meta:table-count="0" meta:image-count="0" meta:object-count="0" meta:page-count="1" meta:paragraph-count="11" meta:word-count="147" meta:character-count="1171" meta:non-whitespace-character-count="1038"/>
    <meta:generator>LibreOffice/26.2.0.3$Windows_X86_64 LibreOffice_project/620$Build-3</meta:generator>
  </office:meta>
</office:document-meta>
</file>