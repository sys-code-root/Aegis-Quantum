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yber Vault Intelligence Store (Project 032)</text:h>
      <text:p text:style-name="Text_20_body">A dedicated storage engine for the Security Lab, responsible for the persistent archival of collected intelligence, scan results, and forensic findings.</text:p>
      <text:h text:style-name="Heading_20_2" text:outline-level="2">Technical Explanation</text:h>
      <text:list text:style-name="L1">
        <text:list-item>
          <text:p text:style-name="P1"><text:span text:style-name="T1">Relational Persistence:</text:span> Uses SQLite3 to provide a lightweight, file-based relational database system that doesn't require an external server daemon.</text:p>
        </text:list-item>
        <text:list-item>
          <text:p text:style-name="P1"><text:span text:style-name="T1">Prepared Statement Security:</text:span> Implements parameterized queries (<text:span text:style-name="T2">?</text:span> markers) to ensure that stored data is treated strictly as values, neutralizing internal SQL injection attacks within the toolset.</text:p>
        </text:list-item>
        <text:list-item>
          <text:p text:style-name="P1"><text:span text:style-name="T1">Schema Normalization:</text:span> Organizes unstructured findings (like lists of emails) into structured rows, enabling future cross-referencing and trend analysi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Intelligence Volatility:</text:span> Prevents the loss of collected security data (like harvested emails) by forcing it from memory into persistent storage.</text:p>
        </text:list-item>
        <text:list-item>
          <text:p text:style-name="P2"><text:span text:style-name="T1">Standardized Audit Trail:</text:span> Creates a time-stamped history (<text:span text:style-name="T2">data_scan</text:span>) of all performed security operations, crucial for auditing and historical reviews.</text:p>
        </text:list-item>
      </text:list>
      <text:h text:style-name="Heading_20_2" text:outline-level="2" text:is-list-header="true">Usage</text:h>
      <text:p text:style-name="P3">from 032_cyber_vault_database import CyberVault<text:line-break/><text:line-break/># Initialize storage vault<text:line-break/>vault = CyberVault("lab_storage.db")<text:line-break/><text:line-break/># Store scan findings<text:line-break/>vault.save_scan("[https://target.org](https://target.org)", ["sec@target.org"])<text:line-break/><text:line-break/># Finalize connection<text:line-break/>vault.clos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30:44.643850200</meta:creation-date>
    <dc:date>2026-05-25T10:30:49.780896200</dc:date>
    <meta:editing-duration>PT5S</meta:editing-duration>
    <meta:editing-cycles>1</meta:editing-cycles>
    <meta:document-statistic meta:table-count="0" meta:image-count="0" meta:object-count="0" meta:page-count="1" meta:paragraph-count="11" meta:word-count="160" meta:character-count="1286" meta:non-whitespace-character-count="1139"/>
    <meta:generator>LibreOffice/26.2.0.3$Windows_X86_64 LibreOffice_project/620$Build-3</meta:generator>
  </office:meta>
</office:document-meta>
</file>