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ault Intelligence Reader (Project 033)</text:h>
      <text:p text:style-name="Text_20_body">A data retrieval interface that allows security operators to query, filter, and review stored intelligence artifacts within the Security Lab's vault.</text:p>
      <text:h text:style-name="Heading_20_2" text:outline-level="2">Technical Explanation</text:h>
      <text:list text:style-name="L1">
        <text:list-item>
          <text:p text:style-name="P1"><text:span text:style-name="T1">Chronological Indexing:</text:span> Employs <text:span text:style-name="T2">ORDER BY id DESC</text:span> to prioritize the most recent security observations for immediate triage.</text:p>
        </text:list-item>
        <text:list-item>
          <text:p text:style-name="P1"><text:span text:style-name="T1">Partial Match Querying:</text:span> Leverages SQL <text:span text:style-name="T2">LIKE</text:span> operators with wildcard patterns (<text:span text:style-name="T2">%</text:span>) to enable flexible search functionality across stored URL targets.</text:p>
        </text:list-item>
        <text:list-item>
          <text:p text:style-name="P1"><text:span text:style-name="T1">Injection-Proof Retrieval:</text:span> Continues the use of parameterized SQL queries to ensure that even search inputs are handled safely by the database engine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Intelligence Searchability:</text:span> Transforms a static database file into a searchable repository of past scans and OSINT findings.</text:p>
        </text:list-item>
        <text:list-item>
          <text:p text:style-name="P2"><text:span text:style-name="T1">Contextual Retrieval:</text:span> Allows investigators to quickly pull up previous intelligence artifacts related to specific domains or IPs during live investigations.</text:p>
        </text:list-item>
      </text:list>
      <text:h text:style-name="Heading_20_2" text:outline-level="2" text:is-list-header="true">Usage</text:h>
      <text:p text:style-name="P3">from 033_vault_reader import VaultReader<text:line-break/><text:line-break/># Connect to the intelligence vault<text:line-break/>reader = VaultReader("lab_storage.db")<text:line-break/><text:line-break/># Review historical intelligence logs<text:line-break/>reader.list_all_scans()<text:line-break/><text:line-break/># Query artifacts related to a specific target domain<text:line-break/>reader.search_by_url("google.com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0:35:24.723254900</meta:creation-date>
    <dc:date>2026-05-25T10:35:29.587571300</dc:date>
    <meta:editing-duration>PT5S</meta:editing-duration>
    <meta:editing-cycles>1</meta:editing-cycles>
    <meta:document-statistic meta:table-count="0" meta:image-count="0" meta:object-count="0" meta:page-count="1" meta:paragraph-count="11" meta:word-count="161" meta:character-count="1203" meta:non-whitespace-character-count="1055"/>
    <meta:generator>LibreOffice/26.2.0.3$Windows_X86_64 LibreOffice_project/620$Build-3</meta:generator>
  </office:meta>
</office:document-meta>
</file>