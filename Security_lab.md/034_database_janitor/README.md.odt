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abase Janitor (Project 034)</text:h>
      <text:p text:style-name="Text_20_body">An administrative utility for the Security Vault, enabling the update and deletion of stored intelligence records to maintain database hygiene and accuracy.</text:p>
      <text:h text:style-name="Heading_20_2" text:outline-level="2">Technical Explanation</text:h>
      <text:list text:style-name="L1">
        <text:list-item>
          <text:p text:style-name="P1"><text:span text:style-name="T1">Data Sanitization:</text:span> Implements SQL <text:span text:style-name="T2">UPDATE</text:span> and <text:span text:style-name="T2">DELETE</text:span> operations to correct intelligence artifacts that were harvested incorrectly or are no longer relevant.</text:p>
        </text:list-item>
        <text:list-item>
          <text:p text:style-name="P1"><text:span text:style-name="T1">Rowcount Validation:</text:span> Uses SQL operational feedback (<text:span text:style-name="T2">rowcount</text:span>) to provide immediate confirmation of successful data mutations, preventing "silent failures."</text:p>
        </text:list-item>
        <text:list-item>
          <text:p text:style-name="P1"><text:span text:style-name="T1">Atomic Transactions:</text:span> Utilizes <text:span text:style-name="T2">.commit()</text:span> to ensure data consistency during modification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Database Corruption/Inaccuracy:</text:span> Prevents the accumulation of "stale" intelligence that could lead to false positives during OSINT analysis.</text:p>
        </text:list-item>
        <text:list-item>
          <text:p text:style-name="P2"><text:span text:style-name="T1">Storage Management:</text:span> Allows for the removal of sensitive or unwanted records, supporting data privacy and lifecycle compliance.</text:p>
        </text:list-item>
      </text:list>
      <text:h text:style-name="Heading_20_2" text:outline-level="2" text:is-list-header="true">Usage</text:h>
      <text:p text:style-name="P3">from 034_database_janitor import DatabaseJanitor<text:line-break/><text:line-break/># Instantiate janitorial control<text:line-break/>janitor = DatabaseJanitor("lab_storage.db")<text:line-break/><text:line-break/># Rectify metadata for a target record<text:line-break/>janitor.update_email(5, "new_contact@target.com")<text:line-break/><text:line-break/># Purge obsolete or sensitive records<text:line-break/>janitor.delete_record(12)<text:line-break/><text:line-break/>janitor.close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1:55:31.689409000</meta:creation-date>
    <dc:date>2026-05-25T11:55:35.877443000</dc:date>
    <meta:editing-duration>PT4S</meta:editing-duration>
    <meta:editing-cycles>1</meta:editing-cycles>
    <meta:document-statistic meta:table-count="0" meta:image-count="0" meta:object-count="0" meta:page-count="1" meta:paragraph-count="11" meta:word-count="147" meta:character-count="1195" meta:non-whitespace-character-count="1060"/>
    <meta:generator>LibreOffice/26.2.0.3$Windows_X86_64 LibreOffice_project/620$Build-3</meta:generator>
  </office:meta>
</office:document-meta>
</file>