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fo:font-weight="bold"/>
    </style:style>
    <style:style style:name="T2" style:family="text">
      <style:text-properties style:font-name="Liberation Mono"/>
    </style:style>
    <style:style style:name="T3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ecure Vault Injection Patterns (Project 035)</text:h>
      <text:p text:style-name="Text_20_body">A reference implementation demonstrating the implementation of Parameterized Queries as a primary defense against SQL Injection (SQLi) vulnerabilities.</text:p>
      <text:h text:style-name="Heading_20_2" text:outline-level="2">Technical Explanation</text:h>
      <text:list text:style-name="L1">
        <text:list-item>
          <text:p text:style-name="P1"><text:span text:style-name="T1">String Concatenation (Vulnerability):</text:span> Shows how <text:span text:style-name="T2">f-strings</text:span> or direct concatenation allow attackers to escape SQL syntax and manipulate query logic (e.g., using <text:span text:style-name="T2">' OR '1'='1</text:span>).</text:p>
        </text:list-item>
        <text:list-item>
          <text:p text:style-name="P1"><text:span text:style-name="T1">Parameterization (Remediation):</text:span> Explains how <text:span text:style-name="T2">?</text:span> placeholders tell the database engine to prepare the query structure <text:span text:style-name="T3">before</text:span> the data is injected, ensuring inputs cannot modify the query execution path.</text:p>
        </text:list-item>
      </text:list>
      <text:h text:style-name="Heading_20_2" text:outline-level="2" text:is-list-header="true">Why this is critical</text:h>
      <text:list text:style-name="L2">
        <text:list-item>
          <text:p text:style-name="P2"><text:span text:style-name="T1">Prevention vs. Detection:</text:span> While your other scanners <text:span text:style-name="T3">detect</text:span> vulnerabilities, this script shows how to <text:span text:style-name="T3">prevent</text:span> them during the design phase of any application you build.</text:p>
        </text:list-item>
        <text:list-item>
          <text:p text:style-name="P2"><text:span text:style-name="T1">Defense in Depth:</text:span> Even if input sanitization fails at the frontend, parameterized queries act as a final "sandbox" inside the database layer, nullifying the attack.</text:p>
        </text:list-item>
      </text:list>
      <text:h text:style-name="Heading_20_2" text:outline-level="2" text:is-list-header="true">Usage</text:h>
      <text:p text:style-name="P3">from 035_secure_vault_patterns import SecureVaultPatterns<text:line-break/><text:line-break/>vault = SecureVaultPatterns()<text:line-break/><text:line-break/># Demonstrating vulnerability:<text:line-break/># Result: Returns all database rows by bypassing logic<text:line-break/>vault.insecure_search("' OR '1'='1")<text:line-break/><text:line-break/># Demonstrating protection:<text:line-break/># Result: Returns nothing (or an exact match), as the injected string is treated as a literal URL<text:line-break/>vault.secure_search("' OR '1'='1"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5T14:16:14.731574600</meta:creation-date>
    <dc:date>2026-05-25T14:16:18.542497800</dc:date>
    <meta:editing-duration>PT4S</meta:editing-duration>
    <meta:editing-cycles>1</meta:editing-cycles>
    <meta:document-statistic meta:table-count="0" meta:image-count="0" meta:object-count="0" meta:page-count="1" meta:paragraph-count="10" meta:word-count="183" meta:character-count="1323" meta:non-whitespace-character-count="1151"/>
    <meta:generator>LibreOffice/26.2.0.3$Windows_X86_64 LibreOffice_project/620$Build-3</meta:generator>
  </office:meta>
</office:document-meta>
</file>