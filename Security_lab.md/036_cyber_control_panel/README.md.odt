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Liberation Mono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yber Control Panel Base (Project 036)</text:h>
      <text:p text:style-name="Text_20_body">A foundational graphical interface layer used to master window scaling, event loops (<text:span text:style-name="T1">mainloop</text:span>), widget alignment, and system color mapping using Tkinter.</text:p>
      <text:h text:style-name="Heading_20_2" text:outline-level="2">Technical Explanation</text:h>
      <text:list text:style-name="L1">
        <text:list-item>
          <text:p text:style-name="P1"><text:span text:style-name="T2">Root Window Instantiation:</text:span> Initializes the base runtime engine window context through <text:span text:style-name="T1">tk.Tk()</text:span>, allocating thread space for visual rendering.</text:p>
        </text:list-item>
        <text:list-item>
          <text:p text:style-name="P1"><text:span text:style-name="T2">Event-Driven Architecture:</text:span> Implements <text:span text:style-name="T1">.mainloop()</text:span> to block synchronous pipeline termination, shifting the script execution flow to wait for user interaction routines (like exit buttons).</text:p>
        </text:list-item>
        <text:list-item>
          <text:p text:style-name="P1"><text:span text:style-name="T2">Geometry Constraint Mapping:</text:span> Binds strict size values and alternative matrix colors dynamically, ensuring the target viewport maintains layout consistency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2">CLI Friction Reductions:</text:span> Provides the basic structural layout skeleton needed to phase out raw text interface dependencies for less experienced terminal users.</text:p>
        </text:list-item>
        <text:list-item>
          <text:p text:style-name="P2"><text:span text:style-name="T2">Graceful Application Teardown:</text:span> Connects standard button actions directly to <text:span text:style-name="T1">.quit()</text:span>, safely destroying memory-tied processes without system-hang anomalies.</text:p>
        </text:list-item>
      </text:list>
      <text:h text:style-name="Heading_20_2" text:outline-level="2" text:is-list-header="true">Usage</text:h>
      <text:p text:style-name="P3">from 036_cyber_control_panel import CyberControlPanel<text:line-break/><text:line-break/># Deploy the basic monitoring window<text:line-break/>app = CyberControlPanel()<text:line-break/>app.ru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4:30:42.766992600</meta:creation-date>
    <dc:date>2026-05-25T14:30:46.805644600</dc:date>
    <meta:editing-duration>PT4S</meta:editing-duration>
    <meta:editing-cycles>1</meta:editing-cycles>
    <meta:document-statistic meta:table-count="0" meta:image-count="0" meta:object-count="0" meta:page-count="1" meta:paragraph-count="11" meta:word-count="150" meta:character-count="1161" meta:non-whitespace-character-count="1026"/>
    <meta:generator>LibreOffice/26.2.0.3$Windows_X86_64 LibreOffice_project/620$Build-3</meta:generator>
  </office:meta>
</office:document-meta>
</file>