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rk Cyber Interface &amp; Menu Navigation (Project 038)</text:h>
      <text:p text:style-name="Text_20_body">A foundational UI template managing centralized palette controls and clean menu hierarchies to streamline workflow execution paths.</text:p>
      <text:h text:style-name="Heading_20_2" text:outline-level="2">Technical Explanation</text:h>
      <text:list text:style-name="L1">
        <text:list-item>
          <text:p text:style-name="P1"><text:span text:style-name="T1">Menu Cascading Integration:</text:span> Leverages the <text:span text:style-name="T2">tk.Menu</text:span> component with <text:span text:style-name="T2">add_cascade</text:span> layout operations, nesting operations profiles efficiently without cluttering user screen domains.</text:p>
        </text:list-item>
        <text:list-item>
          <text:p text:style-name="P1"><text:span text:style-name="T1">Tearoff Disabling Rule:</text:span> Enforces <text:span text:style-name="T2">tearoff=0</text:span> globally over cascading menus, mitigating accidental creation of broken floating UI child windows.</text:p>
        </text:list-item>
        <text:list-item>
          <text:p text:style-name="P1"><text:span text:style-name="T1">Centralized Skin Ingestion:</text:span> Implements hexadecimal reference keys directly over text rendering parameters, standardizing dark theme assets cleanly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Interface Bloat Mitigation:</text:span> Solves window crowding issues caused by too many physical buttons by hiding system controls behind clean dropdown menus.</text:p>
        </text:list-item>
        <text:list-item>
          <text:p text:style-name="P2"><text:span text:style-name="T1">Branding and Identity Inconsistencies:</text:span> Resolves fractured UI color mapping by establishing unified background and foreground definitions across layout elements.</text:p>
        </text:list-item>
      </text:list>
      <text:h text:style-name="Heading_20_2" text:outline-level="2" text:is-list-header="true">Usage</text:h>
      <text:p text:style-name="P3">from 038_dark_cyber_interface import DarkCyberInterface<text:line-break/><text:line-break/># Start the dark interface engine<text:line-break/>app = DarkCyberInterface()<text:line-break/>app.run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4:38:14.453111600</meta:creation-date>
    <dc:date>2026-05-25T14:38:17.692354500</dc:date>
    <meta:editing-duration>PT3S</meta:editing-duration>
    <meta:editing-cycles>1</meta:editing-cycles>
    <meta:generator>LibreOffice/26.2.0.3$Windows_X86_64 LibreOffice_project/620$Build-3</meta:generator>
    <meta:document-statistic meta:table-count="0" meta:image-count="0" meta:object-count="0" meta:page-count="1" meta:paragraph-count="11" meta:word-count="144" meta:character-count="1129" meta:non-whitespace-character-count="1000"/>
  </office:meta>
</office:document-meta>
</file>