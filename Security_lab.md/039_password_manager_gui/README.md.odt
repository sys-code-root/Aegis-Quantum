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ll GUI Password Vault &amp; Manager (Project 039)</text:h>
      <text:p text:style-name="Text_20_body">An integrated credential-management dashboard that unifies a high-entropy generation engine, frontend inputs, and relational database persistence into a singular application.</text:p>
      <text:h text:style-name="Heading_20_2" text:outline-level="2">Technical Explanation</text:h>
      <text:list text:style-name="L1">
        <text:list-item>
          <text:p text:style-name="P1"><text:span text:style-name="T1">Full-Stack Desktop Integration:</text:span> Hooks GUI execution events directly into specialized backend data streams, combining Tkinter user layouts with SQLite relational persistence.</text:p>
        </text:list-item>
        <text:list-item>
          <text:p text:style-name="P1"><text:span text:style-name="T1">Entropy Parameterization:</text:span> Dynamically builds data matrices using <text:span text:style-name="T2">string</text:span> libraries, ensuring random character selection over customizable lengths.</text:p>
        </text:list-item>
        <text:list-item>
          <text:p text:style-name="P1"><text:span text:style-name="T1">Input-Layer Sanitization Rules:</text:span> Implements synchronous error-trapping (<text:span text:style-name="T2">ValueError</text:span>) on input parameters, checking type validations before allowing data conversion or memory write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Weak Credential Re-usage:</text:span> Eliminates human bias in password selection by generating completely random, unpredictable token signatures.</text:p>
        </text:list-item>
        <text:list-item>
          <text:p text:style-name="P2"><text:span text:style-name="T1">Scattered Audit Metrics:</text:span> Consolidates target configurations and metadata parameters directly into a secure backend architecture instantly.</text:p>
        </text:list-item>
      </text:list>
      <text:h text:style-name="Heading_20_2" text:outline-level="2" text:is-list-header="true">Usage</text:h>
      <text:p text:style-name="P3">from 039_password_manager_gui import PasswordManagerGUI<text:line-break/><text:line-break/># Launch the integrated secure vault dashboard<text:line-break/>app = PasswordManagerGUI()<text:line-break/>app.root.mainloop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4:40:37.031204900</meta:creation-date>
    <dc:date>2026-05-25T14:40:41.507497400</dc:date>
    <meta:editing-duration>PT4S</meta:editing-duration>
    <meta:editing-cycles>1</meta:editing-cycles>
    <meta:document-statistic meta:table-count="0" meta:image-count="0" meta:object-count="0" meta:page-count="1" meta:paragraph-count="11" meta:word-count="142" meta:character-count="1188" meta:non-whitespace-character-count="1061"/>
    <meta:generator>LibreOffice/26.2.0.3$Windows_X86_64 LibreOffice_project/620$Build-3</meta:generator>
  </office:meta>
</office:document-meta>
</file>