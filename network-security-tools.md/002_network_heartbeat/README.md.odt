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Heading">
      <style:paragraph-properties fo:text-align="left" style:justify-single-word="false"/>
    </style:style>
    <style:style style:name="P4" style:family="paragraph" style:parent-style-name="Table_20_Contents">
      <style:paragraph-properties fo:text-align="left" style:justify-single-word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etwork Heartbeat System (Project 2)</text:h>
      <text:p text:style-name="Text_20_body">A robust utility for securing continuous device communication. This tool prevents "Replay Attacks" by attaching a time-based hash to every heartbeat packet.</text:p>
      <text:h text:style-name="Heading_20_2" text:outline-level="2">Purpose</text:h>
      <text:p text:style-name="Text_20_body">In network monitoring, simply sending a "ping" is insecure because anyone can intercept and spoof that signal. This tool ensures that each heartbeat is unique, time-stamped, and cryptographically signed, making captured packets useless to attackers after a few seconds.</text:p>
      <text:h text:style-name="Heading_20_2" text:outline-level="2">Technical Explanation</text:h>
      <text:list text:style-name="L1">
        <text:list-item>
          <text:p text:style-name="P1"><text:span text:style-name="T1">Time-Synchronization:</text:span> Uses <text:span text:style-name="T2">time.time()</text:span> to generate a sliding-window authentication.</text:p>
        </text:list-item>
        <text:list-item>
          <text:p text:style-name="P1"><text:span text:style-name="T1">Cryptographic Hashing:</text:span> Uses <text:span text:style-name="T2">SHA-256</text:span> to create a signature that binds the specific time to your secret key.</text:p>
        </text:list-item>
        <text:list-item>
          <text:p text:style-name="P1"><text:span text:style-name="T1">Secure Comparison:</text:span> Uses <text:span text:style-name="T2">secrets.compare_digest</text:span> to perform constant-time comparisons, mitigating timing side-channel attacks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Replay Attacks:</text:span> An attacker cannot reuse an old heartbeat because the server will reject packets outside the defined <text:span text:style-name="T2">window_seconds</text:span>.</text:p>
        </text:list-item>
        <text:list-item>
          <text:p text:style-name="P2"><text:span text:style-name="T1">Authentication:</text:span> Ensures that only devices possessing the <text:span text:style-name="T2">secret_key</text:span> can generate valid heartbeats.</text:p>
        </text:list-item>
        <text:list-item>
          <text:p text:style-name="P2"><text:span text:style-name="T1">Data Integrity:</text:span> If even one bit of the timestamp or key changes, the hash will fail to validate.</text:p>
        </text:list-item>
      </text:list>
      <text:h text:style-name="Heading_20_2" text:outline-level="2" text:is-list-header="true">Design Decisions</text:h>
      <table:table table:name="Tabela1" table:style-name="Tabela1">
        <table:table-column table:style-name="Tabela1.A" table:number-columns-repeated="3"/>
        <table:table-header-rows>
          <table:table-row>
            <table:table-cell table:style-name="Tabela1.A1" office:value-type="string">
              <text:p text:style-name="P3">Feature</text:p>
            </table:table-cell>
            <table:table-cell table:style-name="Tabela1.A1" office:value-type="string">
              <text:p text:style-name="P3">Choice</text:p>
            </table:table-cell>
            <table:table-cell table:style-name="Tabela1.C1" office:value-type="string">
              <text:p text:style-name="P3">Why?</text:p>
            </table:table-cell>
          </table:table-row>
        </table:table-header-rows>
        <table:table-row>
          <table:table-cell table:style-name="Tabela1.A2" office:value-type="string">
            <text:p text:style-name="Table_20_Contents"><text:span text:style-name="T1">Integrity</text:span></text:p>
          </table:table-cell>
          <table:table-cell table:style-name="Tabela1.A2" office:value-type="string">
            <text:p text:style-name="Table_20_Contents"><text:span text:style-name="T2">SHA-256</text:span></text:p>
          </table:table-cell>
          <table:table-cell table:style-name="Tabela1.C2" office:value-type="string">
            <text:p text:style-name="P4">Provides a high-collision resistance hash, ideal for small security tokens.</text:p>
          </table:table-cell>
        </table:table-row>
        <table:table-row>
          <table:table-cell table:style-name="Tabela1.A2" office:value-type="string">
            <text:p text:style-name="Table_20_Contents"><text:span text:style-name="T1">Logic</text:span></text:p>
          </table:table-cell>
          <table:table-cell table:style-name="Tabela1.A2" office:value-type="string">
            <text:p text:style-name="P4">Time-based window</text:p>
          </table:table-cell>
          <table:table-cell table:style-name="Tabela1.C2" office:value-type="string">
            <text:p text:style-name="P4">Prevents stale packets from being accepted, a core requirement for secure UDP streaming.</text:p>
          </table:table-cell>
        </table:table-row>
        <table:table-row>
          <table:table-cell table:style-name="Tabela1.A2" office:value-type="string">
            <text:p text:style-name="Table_20_Contents"><text:span text:style-name="T1">Security</text:span></text:p>
          </table:table-cell>
          <table:table-cell table:style-name="Tabela1.A2" office:value-type="string">
            <text:p text:style-name="Table_20_Contents"><text:span text:style-name="T2">secrets</text:span> module</text:p>
          </table:table-cell>
          <table:table-cell table:style-name="Tabela1.C2" office:value-type="string">
            <text:p text:style-name="Table_20_Contents">Preferable over <text:span text:style-name="T2">random</text:span> or <text:span text:style-name="T2">hashlib</text:span> alone for constant-time comparisons in security contexts.</text:p>
          </table:table-cell>
        </table:table-row>
      </table:table>
      <text:p text:style-name="Text_20_body"/>
      <text:h text:style-name="Heading_20_2" text:outline-level="2"><text:soft-page-break/>Usage</text:h>
      <text:p text:style-name="P5">from project_2_network_heartbeat import NetworkHeartbeat<text:line-break/><text:line-break/>key = "YOUR_SHARED_SECRET"<text:line-break/>hb = NetworkHeartbeat(key)<text:line-break/><text:line-break/># Generate a secure packet<text:line-break/>packet = hb.generate_heartbeat()<text:line-break/><text:line-break/># Verify on receiver side<text:line-break/>is_valid, msg = NetworkHeartbeat.verify_heartbeat(packet, key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9T17:11:16.471844600</meta:creation-date>
    <dc:date>2026-05-19T17:11:25.036237300</dc:date>
    <meta:editing-duration>PT8S</meta:editing-duration>
    <meta:editing-cycles>1</meta:editing-cycles>
    <meta:document-statistic meta:table-count="1" meta:image-count="0" meta:object-count="0" meta:page-count="2" meta:paragraph-count="27" meta:word-count="240" meta:character-count="1766" meta:non-whitespace-character-count="1556"/>
    <meta:generator>LibreOffice/26.2.0.3$Windows_X86_64 LibreOffice_project/620$Build-3</meta:generator>
  </office:meta>
</office:document-meta>
</file>