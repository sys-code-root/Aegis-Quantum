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 Integrity Monitor (Project 3)</text:h>
      <text:p text:style-name="Text_20_body">A security utility designed to detect unauthorized modifications to system files or sensitive configurations by performing continuous cryptographic integrity checks.</text:p>
      <text:h text:style-name="Heading_20_2" text:outline-level="2">Purpose</text:h>
      <text:p text:style-name="Text_20_body">In cybersecurity, an attacker's primary goal is often to alter system configuration files to gain persistence. This tool provides a baseline "fingerprint" of a file and alerts the administrator if the file's content deviates from that fingerprint.</text:p>
      <text:h text:style-name="Heading_20_2" text:outline-level="2">Technical Explanation</text:h>
      <text:list text:style-name="L1">
        <text:list-item>
          <text:p text:style-name="P1"><text:span text:style-name="T1">Chunk-based Hashing:</text:span> Uses 4096-byte blocks to read files, ensuring that the script can handle large files without exhausting system memory.</text:p>
        </text:list-item>
        <text:list-item>
          <text:p text:style-name="P1"><text:span text:style-name="T1">Cryptographic Verification:</text:span> Uses <text:span text:style-name="T2">SHA-256</text:span> to create a secure hash. Even a change of a single character in the file will result in a completely different hash (Avalanche Effect)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Unauthorized Tampering:</text:span> Detects if configuration files (like <text:span text:style-name="T2">hosts</text:span>, <text:span text:style-name="T2">.ssh/authorized_keys</text:span>, or app settings) were modified.</text:p>
        </text:list-item>
        <text:list-item>
          <text:p text:style-name="P2"><text:span text:style-name="T1">Audit Trail:</text:span> Provides a programmatic way to verify system state during a security incident.</text:p>
        </text:list-item>
        <text:list-item>
          <text:p text:style-name="P2"><text:span text:style-name="T1">Persistence Detection:</text:span> Helps identify if a backdoor was injected into your script files.</text:p>
        </text:list-item>
      </text:list>
      <text:h text:style-name="Heading_20_2" text:outline-level="2" text:is-list-header="true">Design Decisions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Hashing Algorithm</text:span></text:p>
          </table:table-cell>
          <table:table-cell table:style-name="Tabela1.A2" office:value-type="string">
            <text:p text:style-name="Table_20_Contents"><text:span text:style-name="T2">SHA-256</text:span></text:p>
          </table:table-cell>
          <table:table-cell table:style-name="Tabela1.C2" office:value-type="string">
            <text:p text:style-name="P4">Provides an ideal balance between security and performance for integrity monitoring.</text:p>
          </table:table-cell>
        </table:table-row>
        <table:table-row>
          <table:table-cell table:style-name="Tabela1.A2" office:value-type="string">
            <text:p text:style-name="Table_20_Contents"><text:span text:style-name="T1">I/O Strategy</text:span></text:p>
          </table:table-cell>
          <table:table-cell table:style-name="Tabela1.A2" office:value-type="string">
            <text:p text:style-name="P4">Chunked Reading</text:p>
          </table:table-cell>
          <table:table-cell table:style-name="Tabela1.C2" office:value-type="string">
            <text:p text:style-name="P4">Allows the tool to monitor large log files without loading them entirely into RAM.</text:p>
          </table:table-cell>
        </table:table-row>
        <table:table-row>
          <table:table-cell table:style-name="Tabela1.A2" office:value-type="string">
            <text:p text:style-name="Table_20_Contents"><text:span text:style-name="T1">Modularity</text:span></text:p>
          </table:table-cell>
          <table:table-cell table:style-name="Tabela1.A2" office:value-type="string">
            <text:p text:style-name="Table_20_Contents"><text:span text:style-name="T2">staticmethod</text:span></text:p>
          </table:table-cell>
          <table:table-cell table:style-name="Tabela1.C2" office:value-type="string">
            <text:p text:style-name="P4">The hash calculation logic is stateless, making it easy to import into other security automation scripts.</text:p>
          </table:table-cell>
        </table:table-row>
      </table:table>
      <text:p text:style-name="Text_20_body"/>
      <text:h text:style-name="Heading_20_2" text:outline-level="2">Usage</text:h>
      <text:p text:style-name="P5">from project_3_file_integrity_monitor import IntegrityMonitor<text:line-break/><text:line-break/>monitor = IntegrityMonitor()<text:line-break/># Get original hash<text:line-break/><text:soft-page-break/>baseline = monitor.calculate_hash("my_config.conf")<text:line-break/><text:line-break/># Start monitor<text:line-break/>monitor.monitor("my_config.conf", baselin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7:34:21.093864100</meta:creation-date>
    <dc:date>2026-05-19T17:34:26.744894700</dc:date>
    <meta:editing-duration>PT5S</meta:editing-duration>
    <meta:editing-cycles>1</meta:editing-cycles>
    <meta:document-statistic meta:table-count="1" meta:image-count="0" meta:object-count="0" meta:page-count="2" meta:paragraph-count="26" meta:word-count="236" meta:character-count="1718" meta:non-whitespace-character-count="1511"/>
    <meta:generator>LibreOffice/26.2.0.3$Windows_X86_64 LibreOffice_project/620$Build-3</meta:generator>
  </office:meta>
</office:document-meta>
</file>