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NS Anomaly Detector (Project 4)</text:h>
      <text:p text:style-name="Text_20_body">A security utility designed to identify potentially malicious DNS queries, helping to detect data exfiltration attempts through DNS tunneling.</text:p>
      <text:h text:style-name="Heading_20_2" text:outline-level="2">Purpose</text:h>
      <text:p text:style-name="Text_20_body">DNS is the backbone of network resolution but is frequently abused for "DNS Tunneling"—where sensitive data is encoded into subdomains. This tool acts as a lightweight filter to audit DNS logs and flag domains that exhibit "high-entropy" (random) patterns or abnormal lengths.</text:p>
      <text:h text:style-name="Heading_20_2" text:outline-level="2">Technical Explanation</text:h>
      <text:list text:style-name="L1">
        <text:list-item>
          <text:p text:style-name="P1"><text:span text:style-name="T1">Heuristic Analysis:</text:span> Uses regular expressions to calculate the ratio of numeric digits to alphabetic characters, identifying domains that look like encoded payloads rather than human-readable URLs.</text:p>
        </text:list-item>
        <text:list-item>
          <text:p text:style-name="P1"><text:span text:style-name="T1">Fingerprinting:</text:span> Uses <text:span text:style-name="T2">SHA-256</text:span> to create a deterministic ID for every domain encountered, allowing security teams to correlate blocked domains across different log file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Data Exfiltration Detection:</text:span> Identifies attempts to smuggle data out via DNS subdomains.</text:p>
        </text:list-item>
        <text:list-item>
          <text:p text:style-name="P2"><text:span text:style-name="T1">Alerting:</text:span> Provides a programmatic way to flag "weird" traffic for manual security review.</text:p>
        </text:list-item>
        <text:list-item>
          <text:p text:style-name="P2"><text:span text:style-name="T1">Log Correlation:</text:span> Creates consistent IDs for domains, helping build a history of suspicious behavior.</text:p>
        </text:list-item>
      </text:list>
      <text:h text:style-name="Heading_20_2" text:outline-level="2" text:is-list-header="true">Design Decisions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Heuristic Logic</text:span></text:p>
          </table:table-cell>
          <table:table-cell table:style-name="Tabela1.A2" office:value-type="string">
            <text:p text:style-name="Table_20_Contents">Regex (<text:span text:style-name="T2">re</text:span> module)</text:p>
          </table:table-cell>
          <table:table-cell table:style-name="Tabela1.C2" office:value-type="string">
            <text:p text:style-name="P4">Offers a low-overhead, high-speed way to filter thousands of DNS queries in real-time.</text:p>
          </table:table-cell>
        </table:table-row>
        <table:table-row>
          <table:table-cell table:style-name="Tabela1.A2" office:value-type="string">
            <text:p text:style-name="Table_20_Contents"><text:span text:style-name="T1">Fingerprint</text:span></text:p>
          </table:table-cell>
          <table:table-cell table:style-name="Tabela1.A2" office:value-type="string">
            <text:p text:style-name="Table_20_Contents"><text:span text:style-name="T2">SHA-256</text:span></text:p>
          </table:table-cell>
          <table:table-cell table:style-name="Tabela1.C2" office:value-type="string">
            <text:p text:style-name="P4">Provides a fixed-length string (truncated to 16 chars) which is perfect for database indexing.</text:p>
          </table:table-cell>
        </table:table-row>
        <table:table-row>
          <table:table-cell table:style-name="Tabela1.A2" office:value-type="string">
            <text:p text:style-name="Table_20_Contents"><text:span text:style-name="T1">Algorithm</text:span></text:p>
          </table:table-cell>
          <table:table-cell table:style-name="Tabela1.A2" office:value-type="string">
            <text:p text:style-name="P4">Length/Randomness</text:p>
          </table:table-cell>
          <table:table-cell table:style-name="Tabela1.C2" office:value-type="string">
            <text:p text:style-name="Table_20_Contents">DNS Tunneling tools (like <text:span text:style-name="T2">iodine</text:span>) create very distinct patterns; length checks are the first line of defense.</text:p>
          </table:table-cell>
        </table:table-row>
      </table:table>
      <text:p text:style-name="Text_20_body"/>
      <text:h text:style-name="Heading_20_2" text:outline-level="2">Usage</text:h>
      <text:p text:style-name="P5">from project_4_dns_anomaly_detector import DNSAnomalyDetector<text:line-break/><text:line-break/>detector = DNSAnomalyDetector()<text:line-break/>status, reason = detector.is_suspicious("exemplo.com")<text:line-break/><text:soft-page-break/><text:line-break/>if status:<text:line-break/> <text:s text:c="3"/>print(f"ALERT: {reason}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09:34:12.218939500</meta:creation-date>
    <dc:date>2026-05-21T09:34:19.152838300</dc:date>
    <meta:editing-duration>PT7S</meta:editing-duration>
    <meta:editing-cycles>1</meta:editing-cycles>
    <meta:document-statistic meta:table-count="1" meta:image-count="0" meta:object-count="0" meta:page-count="2" meta:paragraph-count="26" meta:word-count="239" meta:character-count="1736" meta:non-whitespace-character-count="1523"/>
    <meta:generator>LibreOffice/26.2.0.3$Windows_X86_64 LibreOffice_project/620$Build-3</meta:generator>
  </office:meta>
</office:document-meta>
</file>